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3.441cm" table:align="left"/>
    </style:style>
    <style:style style:name="Tabela1.A" style:family="table-column">
      <style:table-column-properties style:column-width="0.848cm"/>
    </style:style>
    <style:style style:name="Tabela1.B" style:family="table-column">
      <style:table-column-properties style:column-width="2.59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2.312cm" table:align="left"/>
    </style:style>
    <style:style style:name="Tabela2.A" style:family="table-column">
      <style:table-column-properties style:column-width="1.623cm"/>
    </style:style>
    <style:style style:name="Tabela2.B" style:family="table-column">
      <style:table-column-properties style:column-width="0.6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2.312cm" table:align="left"/>
    </style:style>
    <style:style style:name="Tabela3.A" style:family="table-column">
      <style:table-column-properties style:column-width="1.623cm"/>
    </style:style>
    <style:style style:name="Tabela3.B" style:family="table-column">
      <style:table-column-properties style:column-width="0.69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3.701cm" table:align="left"/>
    </style:style>
    <style:style style:name="Tabela4.A" style:family="table-column">
      <style:table-column-properties style:column-width="2.542cm"/>
    </style:style>
    <style:style style:name="Tabela4.B" style:family="table-column">
      <style:table-column-properties style:column-width="1.159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4.147cm" table:align="left"/>
    </style:style>
    <style:style style:name="Tabela5.A" style:family="table-column">
      <style:table-column-properties style:column-width="1.552cm"/>
    </style:style>
    <style:style style:name="Tabela5.B" style:family="table-column">
      <style:table-column-properties style:column-width="2.595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6.759cm" table:align="left"/>
    </style:style>
    <style:style style:name="Tabela6.A" style:family="table-column">
      <style:table-column-properties style:column-width="2.185cm"/>
    </style:style>
    <style:style style:name="Tabela6.B" style:family="table-column">
      <style:table-column-properties style:column-width="3.313cm"/>
    </style:style>
    <style:style style:name="Tabela6.C" style:family="table-column">
      <style:table-column-properties style:column-width="1.261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.856cm" table:align="left"/>
    </style:style>
    <style:style style:name="Tabela7.A" style:family="table-column">
      <style:table-column-properties style:column-width="0.848cm"/>
    </style:style>
    <style:style style:name="Tabela7.B" style:family="table-column">
      <style:table-column-properties style:column-width="1.007cm"/>
    </style:style>
    <style:style style:name="Tabela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b0306" officeooo:paragraph-rsid="000b0306"/>
    </style:style>
    <style:style style:name="P2" style:family="paragraph" style:parent-style-name="Standard">
      <style:paragraph-properties fo:text-align="justify" style:justify-single-word="false"/>
      <style:text-properties officeooo:rsid="000b0306" officeooo:paragraph-rsid="000b0306"/>
    </style:style>
    <style:style style:name="P3" style:family="paragraph" style:parent-style-name="Standard">
      <style:text-properties officeooo:rsid="000b179c" officeooo:paragraph-rsid="000b179c"/>
    </style:style>
    <style:style style:name="P4" style:family="paragraph" style:parent-style-name="Standard">
      <style:text-properties officeooo:rsid="000c072e" officeooo:paragraph-rsid="000c072e"/>
    </style:style>
    <style:style style:name="P5" style:family="paragraph" style:parent-style-name="Heading_20_1">
      <style:text-properties officeooo:rsid="000c072e" officeooo:paragraph-rsid="000c072e"/>
    </style:style>
    <style:style style:name="P6" style:family="paragraph" style:parent-style-name="Text_20_body">
      <style:text-properties officeooo:rsid="000c072e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rsid="000c072e"/>
    </style:style>
    <style:style style:name="P8" style:family="paragraph" style:parent-style-name="Text_20_body" style:list-style-name="L1">
      <style:text-properties officeooo:rsid="000c072e"/>
    </style:style>
    <style:style style:name="P9" style:family="paragraph" style:parent-style-name="Heading_20_1">
      <style:text-properties officeooo:rsid="000c072e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officeooo:rsid="000c072e"/>
    </style:style>
    <style:style style:name="P11" style:family="paragraph" style:parent-style-name="Text_20_body" style:list-style-name="L2">
      <style:text-properties officeooo:rsid="000c072e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rsid="000c072e"/>
    </style:style>
    <style:style style:name="P13" style:family="paragraph" style:parent-style-name="Text_20_body" style:list-style-name="L3">
      <style:text-properties officeooo:rsid="000c072e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officeooo:rsid="000c072e"/>
    </style:style>
    <style:style style:name="P15" style:family="paragraph" style:parent-style-name="Text_20_body" style:list-style-name="L4">
      <style:text-properties officeooo:rsid="000c072e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officeooo:rsid="000c072e"/>
    </style:style>
    <style:style style:name="P17" style:family="paragraph" style:parent-style-name="Text_20_body" style:list-style-name="L5">
      <style:text-properties officeooo:rsid="000c072e"/>
    </style:style>
    <style:style style:name="P18" style:family="paragraph" style:parent-style-name="Heading_20_2">
      <style:text-properties officeooo:rsid="000c072e"/>
    </style:style>
    <style:style style:name="P19" style:family="paragraph" style:parent-style-name="Heading_20_3">
      <style:text-properties officeooo:rsid="000c072e"/>
    </style:style>
    <style:style style:name="P20" style:family="paragraph" style:parent-style-name="Text_20_body" style:list-style-name="L6">
      <style:paragraph-properties fo:margin-top="0cm" fo:margin-bottom="0cm" style:contextual-spacing="false"/>
      <style:text-properties officeooo:rsid="000c072e"/>
    </style:style>
    <style:style style:name="P21" style:family="paragraph" style:parent-style-name="Text_20_body" style:list-style-name="L6">
      <style:text-properties officeooo:rsid="000c072e"/>
    </style:style>
    <style:style style:name="P22" style:family="paragraph" style:parent-style-name="Horizontal_20_Line">
      <style:text-properties officeooo:rsid="000c072e"/>
    </style:style>
    <style:style style:name="P23" style:family="paragraph" style:parent-style-name="Text_20_body" style:list-style-name="L7">
      <style:paragraph-properties fo:margin-top="0cm" fo:margin-bottom="0cm" style:contextual-spacing="false"/>
      <style:text-properties officeooo:rsid="000c072e"/>
    </style:style>
    <style:style style:name="P24" style:family="paragraph" style:parent-style-name="Text_20_body" style:list-style-name="L7">
      <style:text-properties officeooo:rsid="000c072e"/>
    </style:style>
    <style:style style:name="P25" style:family="paragraph" style:parent-style-name="Text_20_body">
      <style:text-properties officeooo:rsid="000c072e" officeooo:paragraph-rsid="000c072e"/>
    </style:style>
    <style:style style:name="P26" style:family="paragraph" style:parent-style-name="Text_20_body" style:list-style-name="L8">
      <style:paragraph-properties fo:margin-top="0cm" fo:margin-bottom="0cm" style:contextual-spacing="false"/>
      <style:text-properties officeooo:rsid="000c072e"/>
    </style:style>
    <style:style style:name="P27" style:family="paragraph" style:parent-style-name="Text_20_body" style:list-style-name="L8">
      <style:text-properties officeooo:rsid="000c072e"/>
    </style:style>
    <style:style style:name="P28" style:family="paragraph" style:parent-style-name="Text_20_body" style:list-style-name="L9">
      <style:paragraph-properties fo:margin-top="0cm" fo:margin-bottom="0cm" style:contextual-spacing="false"/>
      <style:text-properties officeooo:rsid="000c072e"/>
    </style:style>
    <style:style style:name="P29" style:family="paragraph" style:parent-style-name="Text_20_body" style:list-style-name="L9">
      <style:text-properties officeooo:rsid="000c072e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officeooo:rsid="000c072e"/>
    </style:style>
    <style:style style:name="P31" style:family="paragraph" style:parent-style-name="Preformatted_20_Text">
      <style:text-properties officeooo:rsid="000c072e"/>
    </style:style>
    <style:style style:name="P32" style:family="paragraph" style:parent-style-name="Preformatted_20_Text">
      <style:paragraph-properties fo:margin-top="0cm" fo:margin-bottom="0.499cm" style:contextual-spacing="false"/>
      <style:text-properties officeooo:rsid="000c072e"/>
    </style:style>
    <style:style style:name="P3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rsid="000c072e"/>
    </style:style>
    <style:style style:name="P34" style:family="paragraph" style:parent-style-name="Quotations">
      <style:text-properties officeooo:rsid="000c072e"/>
    </style:style>
    <style:style style:name="P35" style:family="paragraph" style:parent-style-name="Text_20_body" style:list-style-name="L10">
      <style:paragraph-properties fo:margin-top="0cm" fo:margin-bottom="0cm" style:contextual-spacing="false"/>
      <style:text-properties officeooo:rsid="000c072e"/>
    </style:style>
    <style:style style:name="P36" style:family="paragraph" style:parent-style-name="Text_20_body" style:list-style-name="L10">
      <style:text-properties officeooo:rsid="000c072e"/>
    </style:style>
    <style:style style:name="T1" style:family="text">
      <style:text-properties officeooo:rsid="000b179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rupamento de comentários de vários vídeos do youtube</text:p>
      <text:p text:style-name="P1"/>
      <text:p text:style-name="P1">1-<text:span text:style-name="T1">Objetivo</text:span></text:p>
      <text:p text:style-name="P1"/>
      <text:p text:style-name="P2"><text:span text:style-name="T1">O objetivo desse projeto é construir um sistema que permita mapear perfis de audiências e temas recorrentes de vários canais do youtube, ao longo do tempo, usando tecnicas de machine learning e processamento de linguagem natural, além de propor uma estrutura de coleta e organização dos dados</text:span></text:p>
      <text:p text:style-name="P2"/>
      <text:p text:style-name="P1">2- <text:span text:style-name="T1">Tecnologias Usadas</text:span></text:p>
      <text:p text:style-name="P3">Python3.11</text:p>
      <text:p text:style-name="P3">sklearn</text:p>
      <text:p text:style-name="P3">spacy</text:p>
      <text:p text:style-name="P3">apache superset</text:p>
      <text:p text:style-name="P3"/>
      <text:p text:style-name="P4">3 – Arquitetura da solução</text:p>
      <text:p text:style-name="P4">3.1-coleta</text:p>
      <text:p text:style-name="P4"/>
      <text:p text:style-name="P4">3.2 – Amarzenamento</text:p>
      <text:p text:style-name="P4"/>
      <text:p text:style-name="P4"/>
      <text:p text:style-name="P4">3.3-Treinamento modelo</text:p>
      <text:p text:style-name="P4"/>
      <text:h text:style-name="P5" text:outline-level="1">11. Dashboard (Superset)</text:h>
      <text:p text:style-name="P6">Apache Superset</text:p>
      <text:p text:style-name="P6">Visualizações:</text:p>
      <text:list text:style-name="L1">
        <text:list-item>
          <text:p text:style-name="P7">evolução de clusters no tempo </text:p>
        </text:list-item>
        <text:list-item>
          <text:p text:style-name="P7">heatmap de drift </text:p>
        </text:list-item>
        <text:list-item>
          <text:p text:style-name="P7">distribuição de audiência por vídeo </text:p>
        </text:list-item>
        <text:list-item>
          <text:p text:style-name="P7">clusters emergentes vs estáveis </text:p>
        </text:list-item>
        <text:list-item>
          <text:p text:style-name="P8">palavras-chave por cluster </text:p>
        </text:list-item>
      </text:list>
      <text:p text:style-name="P6"/>
      <text:h text:style-name="P9" text:outline-level="1">12. Camada de interpretação (spaCy)</text:h>
      <text:p text:style-name="P6">Use spaCy para:</text:p>
      <text:list text:style-name="L2">
        <text:list-item>
          <text:p text:style-name="P10">extração de entidades (NER) </text:p>
        </text:list-item>
        <text:list-item>
          <text:p text:style-name="P10">keywords por cluster </text:p>
        </text:list-item>
        <text:list-item>
          <text:p text:style-name="P11">padrões linguísticos </text:p>
        </text:list-item>
      </text:list>
      <text:p text:style-name="P6">Exemplo:</text:p>
      <text:list text:style-name="L3">
        <text:list-item>
          <text:p text:style-name="P12">Cluster 1: "tutorial", "aprendi", "explicação" </text:p>
        </text:list-item>
        <text:list-item>
          <text:p text:style-name="P13">Cluster 2: "não funciona", "erro", "bug" </text:p>
        </text:list-item>
      </text:list>
      <text:p text:style-name="P6"/>
      <text:h text:style-name="P5" text:outline-level="1"><text:soft-page-break/>12. Camada de interpretação (spaCy)</text:h>
      <text:p text:style-name="P6">Use spaCy para:</text:p>
      <text:list text:style-name="L4">
        <text:list-item>
          <text:p text:style-name="P14">extração de entidades (NER) </text:p>
        </text:list-item>
        <text:list-item>
          <text:p text:style-name="P14">keywords por cluster </text:p>
        </text:list-item>
        <text:list-item>
          <text:p text:style-name="P15">padrões linguísticos </text:p>
        </text:list-item>
      </text:list>
      <text:p text:style-name="P6">Exemplo:</text:p>
      <text:list text:style-name="L5">
        <text:list-item>
          <text:p text:style-name="P16">Cluster 1: "tutorial", "aprendi", "explicação" </text:p>
        </text:list-item>
        <text:list-item>
          <text:p text:style-name="P17">Cluster 2: "não funciona", "erro", "bug" </text:p>
        </text:list-item>
      </text:list>
      <text:p text:style-name="P4"/>
      <text:p text:style-name="P4"/>
      <text:h text:style-name="P5" text:outline-level="1">9. MLflow (parte importante)</text:h>
      <text:h text:style-name="P18" text:outline-level="2">O que rastrear</text:h>
      <text:h text:style-name="P19" text:outline-level="3">Experimentos:</text:h>
      <text:list text:style-name="L6">
        <text:list-item>
          <text:p text:style-name="P20">embedding model (spaCy vs BERT) </text:p>
        </text:list-item>
        <text:list-item>
          <text:p text:style-name="P20">algoritmo clustering </text:p>
        </text:list-item>
        <text:list-item>
          <text:p text:style-name="P20">parâmetros HDBSCAN </text:p>
        </text:list-item>
        <text:list-item>
          <text:p text:style-name="P21">métricas de estabilidade temporal </text:p>
        </text:list-item>
      </text:list>
      <text:p text:style-name="P22"/>
      <text:h text:style-name="P18" text:outline-level="2">Métricas</text:h>
      <text:list text:style-name="L7">
        <text:list-item>
          <text:p text:style-name="P23">número de clusters por dia </text:p>
        </text:list-item>
        <text:list-item>
          <text:p text:style-name="P23">% ruído </text:p>
        </text:list-item>
        <text:list-item>
          <text:p text:style-name="P23">estabilidade de clusters (cosine drift médio) </text:p>
        </text:list-item>
        <text:list-item>
          <text:p text:style-name="P24">silhouette score (opcional) </text:p>
        </text:list-item>
      </text:list>
      <text:p text:style-name="P4"/>
      <text:p text:style-name="P25">A <text:span text:style-name="Strong_20_Emphasis">detecção de drift de audiência</text:span> é provavelmente a métrica mais valiosa do projeto, porque ela responde perguntas como:</text:p>
      <text:list text:style-name="L8">
        <text:list-item>
          <text:p text:style-name="P26">"A audiência continua a mesma?" </text:p>
        </text:list-item>
        <text:list-item>
          <text:p text:style-name="P26">"Os temas discutidos mudaram?" </text:p>
        </text:list-item>
        <text:list-item>
          <text:p text:style-name="P26">"A percepção do vídeo piorou?" </text:p>
        </text:list-item>
        <text:list-item>
          <text:p text:style-name="P26">"Surgiu um novo grupo de usuários?" </text:p>
        </text:list-item>
        <text:list-item>
          <text:p text:style-name="P27">"Uma polêmica criou um novo comportamento?" </text:p>
        </text:list-item>
      </text:list>
      <text:p text:style-name="P6">O importante é entender que você não está monitorando apenas o drift dos dados (Data Drift), mas também:</text:p>
      <text:list text:style-name="L9">
        <text:list-item>
          <text:p text:style-name="P28"><text:span text:style-name="Strong_20_Emphasis">Audience Drift</text:span> </text:p>
        </text:list-item>
        <text:list-item>
          <text:p text:style-name="P28"><text:span text:style-name="Strong_20_Emphasis">Topic Drift</text:span> </text:p>
        </text:list-item>
        <text:list-item>
          <text:p text:style-name="P28"><text:soft-page-break/><text:span text:style-name="Strong_20_Emphasis">Cluster Drift</text:span> </text:p>
        </text:list-item>
        <text:list-item>
          <text:p text:style-name="P29"><text:span text:style-name="Strong_20_Emphasis">Sentiment Drift</text:span> (opcional) </text:p>
        </text:list-item>
      </text:list>
      <text:p text:style-name="P22"/>
      <text:h text:style-name="P9" text:outline-level="1">1. O que é Drift neste contexto?</text:h>
      <text:p text:style-name="P6">Imagine um vídeo sobre Apache Kafka.</text:p>
      <text:h text:style-name="P18" text:outline-level="2">Dia 1</text:h>
      <text:p text:style-name="P6">Comentários:</text:p>
      <text:section text:style-name="Sect1" text:name="code-block-viewer">
        <text:p text:style-name="P30"><text:span text:style-name="Source_20_Text">Muito boa a explicação</text:span></text:p>
        <text:p text:style-name="P31"><text:span text:style-name="Source_20_Text">Kafka ficou fácil de entender</text:span></text:p>
        <text:p text:style-name="P32"><text:span text:style-name="Source_20_Text">Excelente tutorial</text:span></text:p>
      </text:section>
      <text:p text:style-name="P6">Cluster dominante:</text:p>
      <text:section text:style-name="Sect1" text:name="Seção1">
        <text:p text:style-name="P33"><text:bookmark text:name="code-block-viewer"/><text:span text:style-name="Source_20_Text">Aprendizado Positivo</text:span></text:p>
      </text:section>
      <text:p text:style-name="P22"/>
      <text:h text:style-name="P18" text:outline-level="2">Dia 20</text:h>
      <text:p text:style-name="P6">Comentários:</text:p>
      <text:section text:style-name="Sect1" text:name="Seção2">
        <text:p text:style-name="P30"><text:bookmark text:name="code-block-viewer Copia 1"/><text:span text:style-name="Source_20_Text">A versão mostrada está desatualizada</text:span></text:p>
        <text:p text:style-name="P31"><text:span text:style-name="Source_20_Text">O exemplo não funciona</text:span></text:p>
        <text:p text:style-name="P32"><text:span text:style-name="Source_20_Text">Tem erro no docker compose</text:span></text:p>
      </text:section>
      <text:p text:style-name="P6">Cluster dominante:</text:p>
      <text:section text:style-name="Sect1" text:name="Seção3">
        <text:p text:style-name="P33"><text:bookmark text:name="code-block-viewer Copia 2"/><text:span text:style-name="Source_20_Text">Problemas Técnicos</text:span></text:p>
      </text:section>
      <text:p text:style-name="P6">O vídeo é o mesmo.</text:p>
      <text:p text:style-name="P6">A audiência mudou.</text:p>
      <text:p text:style-name="P6">Isso é um drift.</text:p>
      <text:p text:style-name="P22"/>
      <text:h text:style-name="P9" text:outline-level="1">2. Tipos de Drift que vale monitorar</text:h>
      <text:h text:style-name="P18" text:outline-level="2">A. Volume Drift</text:h>
      <text:p text:style-name="P6">Mudança na quantidade de comentários.</text:p>
      <text:h text:style-name="P19" text:outline-level="3">Exemplo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Dia</text:p>
            </table:table-cell>
            <table:table-cell table:style-name="Tabela1.A1" office:value-type="string">
              <text:p text:style-name="Table_20_Heading">Comentários</text:p>
            </table:table-cell>
          </table:table-row>
        </table:table-header-rows>
        <table:table-row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500</text:p>
          </table:table-cell>
        </table:table-row>
        <text:soft-page-break/>
        <table:table-row>
          <table:table-cell table:style-name="Tabela1.A1" office:value-type="string">
            <text:p text:style-name="Table_20_Contents">2</text:p>
          </table:table-cell>
          <table:table-cell table:style-name="Tabela1.A1" office:value-type="string">
            <text:p text:style-name="Table_20_Contents">520</text:p>
          </table:table-cell>
        </table:table-row>
        <table:table-row>
          <table:table-cell table:style-name="Tabela1.A1" office:value-type="string">
            <text:p text:style-name="Table_20_Contents">3</text:p>
          </table:table-cell>
          <table:table-cell table:style-name="Tabela1.A1" office:value-type="string">
            <text:p text:style-name="Table_20_Contents">530</text:p>
          </table:table-cell>
        </table:table-row>
        <table:table-row>
          <table:table-cell table:style-name="Tabela1.A1" office:value-type="string">
            <text:p text:style-name="Table_20_Contents">4</text:p>
          </table:table-cell>
          <table:table-cell table:style-name="Tabela1.A1" office:value-type="string">
            <text:p text:style-name="Table_20_Contents">4.500</text:p>
          </table:table-cell>
        </table:table-row>
      </table:table>
      <text:p text:style-name="P6">O dia 4 indica um evento anormal.</text:p>
      <text:p text:style-name="P22"/>
      <text:h text:style-name="P18" text:outline-level="2">B. Cluster Size Drift</text:h>
      <text:p text:style-name="P6">Mudança na participação dos clusters.</text:p>
      <text:h text:style-name="P19" text:outline-level="3">Dia 1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Cluster</text:p>
            </table:table-cell>
            <table:table-cell table:style-name="Tabela2.A1" office:value-type="string">
              <text:p text:style-name="Table_20_Heading">%</text:p>
            </table:table-cell>
          </table:table-row>
        </table:table-header-rows>
        <table:table-row>
          <table:table-cell table:style-name="Tabela2.A1" office:value-type="string">
            <text:p text:style-name="Table_20_Contents">Tutorial</text:p>
          </table:table-cell>
          <table:table-cell table:style-name="Tabela2.A1" office:value-type="string">
            <text:p text:style-name="Table_20_Contents">70</text:p>
          </table:table-cell>
        </table:table-row>
        <table:table-row>
          <table:table-cell table:style-name="Tabela2.A1" office:value-type="string">
            <text:p text:style-name="Table_20_Contents">Dúvidas</text:p>
          </table:table-cell>
          <table:table-cell table:style-name="Tabela2.A1" office:value-type="string">
            <text:p text:style-name="Table_20_Contents">20</text:p>
          </table:table-cell>
        </table:table-row>
        <table:table-row>
          <table:table-cell table:style-name="Tabela2.A1" office:value-type="string">
            <text:p text:style-name="Table_20_Contents">Críticas</text:p>
          </table:table-cell>
          <table:table-cell table:style-name="Tabela2.A1" office:value-type="string">
            <text:p text:style-name="Table_20_Contents">10</text:p>
          </table:table-cell>
        </table:table-row>
      </table:table>
      <text:h text:style-name="P19" text:outline-level="3">Dia 10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luster</text:p>
            </table:table-cell>
            <table:table-cell table:style-name="Tabela3.A1" office:value-type="string">
              <text:p text:style-name="Table_20_Heading">%</text:p>
            </table:table-cell>
          </table:table-row>
        </table:table-header-rows>
        <table:table-row>
          <table:table-cell table:style-name="Tabela3.A1" office:value-type="string">
            <text:p text:style-name="Table_20_Contents">Tutorial</text:p>
          </table:table-cell>
          <table:table-cell table:style-name="Tabela3.A1" office:value-type="string">
            <text:p text:style-name="Table_20_Contents">30</text:p>
          </table:table-cell>
        </table:table-row>
        <table:table-row>
          <table:table-cell table:style-name="Tabela3.A1" office:value-type="string">
            <text:p text:style-name="Table_20_Contents">Dúvidas</text:p>
          </table:table-cell>
          <table:table-cell table:style-name="Tabela3.A1" office:value-type="string">
            <text:p text:style-name="Table_20_Contents">15</text:p>
          </table:table-cell>
        </table:table-row>
        <table:table-row>
          <table:table-cell table:style-name="Tabela3.A1" office:value-type="string">
            <text:p text:style-name="Table_20_Contents">Críticas</text:p>
          </table:table-cell>
          <table:table-cell table:style-name="Tabela3.A1" office:value-type="string">
            <text:p text:style-name="Table_20_Contents">55</text:p>
          </table:table-cell>
        </table:table-row>
      </table:table>
      <text:p text:style-name="P6">Mudança importante da audiência.</text:p>
      <text:p text:style-name="P22"/>
      <text:h text:style-name="P18" text:outline-level="2">C. Semantic Drift</text:h>
      <text:p text:style-name="P6">Mudança no significado dos clusters.</text:p>
      <text:p text:style-name="P6">Mesmo cluster.</text:p>
      <text:p text:style-name="P6">Mesmo tema.</text:p>
      <text:p text:style-name="P6">Mas discurso diferente.</text:p>
      <text:p text:style-name="P22"/>
      <text:h text:style-name="P19" text:outline-level="3">Dia 1</text:h>
      <text:section text:style-name="Sect1" text:name="Seção4">
        <text:p text:style-name="P30"><text:bookmark text:name="code-block-viewer Copia 3"/><text:span text:style-name="Source_20_Text">Gostei do tutorial</text:span></text:p>
        <text:p text:style-name="P32"><text:span text:style-name="Source_20_Text">Muito didático</text:span></text:p>
      </text:section>
      <text:p text:style-name="P22"/>
      <text:h text:style-name="P19" text:outline-level="3">Dia 15</text:h>
      <text:section text:style-name="Sect1" text:name="Seção5">
        <text:p text:style-name="P30"><text:bookmark text:name="code-block-viewer Copia 4"/><text:span text:style-name="Source_20_Text">Explicação razoável</text:span></text:p>
        <text:p text:style-name="P32"><text:span text:style-name="Source_20_Text">Faltaram exemplos</text:span></text:p>
      </text:section>
      <text:p text:style-name="P6">O cluster ainda é "Avaliação do Conteúdo".</text:p>
      <text:p text:style-name="P6"><text:soft-page-break/>Mas a semântica mudou.</text:p>
      <text:p text:style-name="P22"/>
      <text:h text:style-name="P9" text:outline-level="1">3. Como medir Semantic Drift</text:h>
      <text:p text:style-name="P6">Você já possui embeddings.</text:p>
      <text:p text:style-name="P6">Cada cluster possui um centróide.</text:p>
      <text:p text:style-name="P22"/>
      <text:h text:style-name="P18" text:outline-level="2">Dia 1</text:h>
      <text:section text:style-name="Sect1" text:name="Seção6">
        <text:p text:style-name="P33"><text:bookmark text:name="code-block-viewer Copia 5"/><text:span text:style-name="Source_20_Text">centroid_day1</text:span></text:p>
      </text:section>
      <text:section text:style-name="Sect1" text:name="Seção7">
        <text:p text:style-name="P33"><text:bookmark text:name="code-block-viewer Copia 6"/><text:span text:style-name="Source_20_Text">[0.21, 0.18, -0.44 ...]</text:span></text:p>
      </text:section>
      <text:p text:style-name="P22"/>
      <text:h text:style-name="P18" text:outline-level="2">Dia 2</text:h>
      <text:section text:style-name="Sect1" text:name="Seção8">
        <text:p text:style-name="P33"><text:bookmark text:name="code-block-viewer Copia 7"/><text:span text:style-name="Source_20_Text">centroid_day2</text:span></text:p>
      </text:section>
      <text:section text:style-name="Sect1" text:name="Seção9">
        <text:p text:style-name="P33"><text:bookmark text:name="code-block-viewer Copia 8"/><text:span text:style-name="Source_20_Text">[0.19, 0.15, -0.42 ...]</text:span></text:p>
      </text:section>
      <text:p text:style-name="P22"/>
      <text:p text:style-name="P6">Calculamos:</text:p>
      <text:section text:style-name="Sect1" text:name="Seção10">
        <text:p text:style-name="P30"><text:bookmark text:name="code-block-viewer Copia 9"/><text:span text:style-name="Source_20_Text">from sklearn.metrics.pairwise import cosine_similarity</text:span></text:p>
        <text:p text:style-name="P31"><text:span text:style-name="Source_20_Text">sim = cosine_similarity(</text:span></text:p>
        <text:p text:style-name="P31"><text:span text:style-name="Source_20_Text"><text:s text:c="4"/>centroid_day1.reshape(1,-1),</text:span></text:p>
        <text:p text:style-name="P31"><text:span text:style-name="Source_20_Text"><text:s text:c="4"/>centroid_day2.reshape(1,-1)</text:span></text:p>
        <text:p text:style-name="P32"><text:span text:style-name="Source_20_Text">)[0][0]</text:span></text:p>
      </text:section>
      <text:p text:style-name="P6">Resultado:</text:p>
      <text:section text:style-name="Sect1" text:name="Seção11">
        <text:p text:style-name="P33"><text:bookmark text:name="code-block-viewer Copia 10"/><text:span text:style-name="Source_20_Text">0.95</text:span></text:p>
      </text:section>
      <text:p text:style-name="P6">Cluster estável.</text:p>
      <text:p text:style-name="P22"/>
      <text:p text:style-name="P6">Outro caso:</text:p>
      <text:section text:style-name="Sect1" text:name="Seção12">
        <text:p text:style-name="P33"><text:bookmark text:name="code-block-viewer Copia 11"/><text:span text:style-name="Source_20_Text">0.52</text:span></text:p>
      </text:section>
      <text:p text:style-name="P6">Grande mudança.</text:p>
      <text:p text:style-name="P22"/>
      <text:h text:style-name="P9" text:outline-level="1">4. Drift Score</text:h>
      <text:p text:style-name="P6">Uma métrica simples:</text:p>
      <text:section text:style-name="Sect1" text:name="Seção13">
        <text:p text:style-name="P33"><text:bookmark text:name="code-block-viewer Copia 12"/><text:soft-page-break/><text:span text:style-name="Source_20_Text">drift = 1 - similarity</text:span></text:p>
      </text:section>
      <text:p text:style-name="P22"/>
      <text:h text:style-name="P19" text:outline-level="3">Exemplo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Similaridade</text:p>
            </table:table-cell>
            <table:table-cell table:style-name="Tabela4.A1" office:value-type="string">
              <text:p text:style-name="Table_20_Heading">Drift</text:p>
            </table:table-cell>
          </table:table-row>
        </table:table-header-rows>
        <table:table-row>
          <table:table-cell table:style-name="Tabela4.A1" office:value-type="string">
            <text:p text:style-name="Table_20_Contents">0.98</text:p>
          </table:table-cell>
          <table:table-cell table:style-name="Tabela4.A1" office:value-type="string">
            <text:p text:style-name="Table_20_Contents">0.02</text:p>
          </table:table-cell>
        </table:table-row>
        <table:table-row>
          <table:table-cell table:style-name="Tabela4.A1" office:value-type="string">
            <text:p text:style-name="Table_20_Contents">0.90</text:p>
          </table:table-cell>
          <table:table-cell table:style-name="Tabela4.A1" office:value-type="string">
            <text:p text:style-name="Table_20_Contents">0.10</text:p>
          </table:table-cell>
        </table:table-row>
        <table:table-row>
          <table:table-cell table:style-name="Tabela4.A1" office:value-type="string">
            <text:p text:style-name="Table_20_Contents">0.70</text:p>
          </table:table-cell>
          <table:table-cell table:style-name="Tabela4.A1" office:value-type="string">
            <text:p text:style-name="Table_20_Contents">0.30</text:p>
          </table:table-cell>
        </table:table-row>
        <table:table-row>
          <table:table-cell table:style-name="Tabela4.A1" office:value-type="string">
            <text:p text:style-name="Table_20_Contents">0.50</text:p>
          </table:table-cell>
          <table:table-cell table:style-name="Tabela4.A1" office:value-type="string">
            <text:p text:style-name="Table_20_Contents">0.50</text:p>
          </table:table-cell>
        </table:table-row>
      </table:table>
      <text:p text:style-name="P22"/>
      <text:p text:style-name="P6">Interpretação:</text:p>
      <text:section text:style-name="Sect1" text:name="Seção14">
        <text:p text:style-name="P30"><text:bookmark text:name="code-block-viewer Copia 13"/><text:span text:style-name="Source_20_Text">0.00 - 0.10 → estável</text:span></text:p>
        <text:p text:style-name="P31"><text:span text:style-name="Source_20_Text">0.10 - 0.25 → atenção</text:span></text:p>
        <text:p text:style-name="P31"><text:span text:style-name="Source_20_Text">0.25 - 0.40 → mudança relevante</text:span></text:p>
        <text:p text:style-name="P32"><text:span text:style-name="Source_20_Text">&gt;0.40 → ruptura</text:span></text:p>
      </text:section>
      <text:p text:style-name="P22"/>
      <text:h text:style-name="P9" text:outline-level="1">5. Drift Global da Audiência</text:h>
      <text:p text:style-name="P6">Você terá vários clusters.</text:p>
      <text:p text:style-name="P6">Exemplo:</text:p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luster</text:p>
            </table:table-cell>
            <table:table-cell table:style-name="Tabela5.A1" office:value-type="string">
              <text:p text:style-name="Table_20_Heading">Similaridade</text:p>
            </table:table-cell>
          </table:table-row>
        </table:table-header-rows>
        <table:table-row>
          <table:table-cell table:style-name="Tabela5.A1" office:value-type="string">
            <text:p text:style-name="Table_20_Contents">0</text:p>
          </table:table-cell>
          <table:table-cell table:style-name="Tabela5.A1" office:value-type="string">
            <text:p text:style-name="Table_20_Contents">0.95</text:p>
          </table:table-cell>
        </table:table-row>
        <table:table-row>
          <table:table-cell table:style-name="Tabela5.A1" office:value-type="string">
            <text:p text:style-name="Table_20_Contents">1</text:p>
          </table:table-cell>
          <table:table-cell table:style-name="Tabela5.A1" office:value-type="string">
            <text:p text:style-name="Table_20_Contents">0.88</text:p>
          </table:table-cell>
        </table:table-row>
        <table:table-row>
          <table:table-cell table:style-name="Tabela5.A1" office:value-type="string">
            <text:p text:style-name="Table_20_Contents">2</text:p>
          </table:table-cell>
          <table:table-cell table:style-name="Tabela5.A1" office:value-type="string">
            <text:p text:style-name="Table_20_Contents">0.91</text:p>
          </table:table-cell>
        </table:table-row>
        <table:table-row>
          <table:table-cell table:style-name="Tabela5.A1" office:value-type="string">
            <text:p text:style-name="Table_20_Contents">3</text:p>
          </table:table-cell>
          <table:table-cell table:style-name="Tabela5.A1" office:value-type="string">
            <text:p text:style-name="Table_20_Contents">0.52</text:p>
          </table:table-cell>
        </table:table-row>
      </table:table>
      <text:p text:style-name="P22"/>
      <text:p text:style-name="P6">Média:</text:p>
      <text:section text:style-name="Sect1" text:name="Seção15">
        <text:p text:style-name="P30"><text:bookmark text:name="code-block-viewer Copia 14"/><text:span text:style-name="Source_20_Text">avg_similarity = df["similarity"].mean()</text:span></text:p>
        <text:p text:style-name="P32"><text:span text:style-name="Source_20_Text">global_drift = 1 - avg_similarity</text:span></text:p>
      </text:section>
      <text:p text:style-name="P6">Resultado:</text:p>
      <text:section text:style-name="Sect1" text:name="Seção16">
        <text:p text:style-name="P33"><text:bookmark text:name="code-block-viewer Copia 15"/><text:span text:style-name="Source_20_Text">0.18</text:span></text:p>
      </text:section>
      <text:p text:style-name="P6">Significa:</text:p>
      <text:p text:style-name="P34">18% de mudança semântica global da audiência.</text:p>
      <text:p text:style-name="P22"/>
      <text:h text:style-name="P9" text:outline-level="1">6. Emergência de Novos Clusters</text:h>
      <text:p text:style-name="P6">Uma das métricas mais importantes.</text:p>
      <text:p text:style-name="P22"><text:soft-page-break/></text:p>
      <text:h text:style-name="P18" text:outline-level="2">Dia 1</text:h>
      <text:p text:style-name="P6">Clusters:</text:p>
      <text:section text:style-name="Sect1" text:name="Seção17">
        <text:p text:style-name="P30"><text:bookmark text:name="code-block-viewer Copia 16"/><text:span text:style-name="Source_20_Text">A</text:span></text:p>
        <text:p text:style-name="P31"><text:span text:style-name="Source_20_Text">B</text:span></text:p>
        <text:p text:style-name="P32"><text:span text:style-name="Source_20_Text">C</text:span></text:p>
      </text:section>
      <text:p text:style-name="P22"/>
      <text:h text:style-name="P18" text:outline-level="2">Dia 2</text:h>
      <text:p text:style-name="P6">Clusters:</text:p>
      <text:section text:style-name="Sect1" text:name="Seção18">
        <text:p text:style-name="P30"><text:bookmark text:name="code-block-viewer Copia 17"/><text:span text:style-name="Source_20_Text">A</text:span></text:p>
        <text:p text:style-name="P31"><text:span text:style-name="Source_20_Text">B</text:span></text:p>
        <text:p text:style-name="P31"><text:span text:style-name="Source_20_Text">C</text:span></text:p>
        <text:p text:style-name="P32"><text:span text:style-name="Source_20_Text">D</text:span></text:p>
      </text:section>
      <text:p text:style-name="P22"/>
      <text:p text:style-name="P6">Cluster D não encontra correspondência.</text:p>
      <text:p text:style-name="P6">Logo:</text:p>
      <text:section text:style-name="Sect1" text:name="Seção19">
        <text:p text:style-name="P33"><text:bookmark text:name="code-block-viewer Copia 18"/><text:span text:style-name="Source_20_Text">Novo tema emergente</text:span></text:p>
      </text:section>
      <text:p text:style-name="P22"/>
      <text:p text:style-name="P6">Código:</text:p>
      <text:section text:style-name="Sect1" text:name="Seção20">
        <text:p text:style-name="P30"><text:bookmark text:name="code-block-viewer Copia 19"/><text:span text:style-name="Source_20_Text">new_clusters = []</text:span></text:p>
        <text:p text:style-name="P31"><text:span text:style-name="Source_20_Text">for cluster in today_clusters:</text:span></text:p>
        <text:p text:style-name="P31"><text:span text:style-name="Source_20_Text"><text:s text:c="4"/>if best_similarity &lt; 0.75:</text:span></text:p>
        <text:p text:style-name="P32"><text:span text:style-name="Source_20_Text"><text:s text:c="8"/>new_clusters.append(cluster)</text:span></text:p>
      </text:section>
      <text:p text:style-name="P22"/>
      <text:p text:style-name="P6">Métrica:</text:p>
      <text:section text:style-name="Sect1" text:name="Seção21">
        <text:p text:style-name="P30"><text:bookmark text:name="code-block-viewer Copia 20"/><text:span text:style-name="Source_20_Text">new_cluster_ratio =</text:span></text:p>
        <text:p text:style-name="P32"><text:span text:style-name="Source_20_Text">len(new_clusters) / total_clusters</text:span></text:p>
      </text:section>
      <text:p text:style-name="P22"/>
      <text:h text:style-name="P9" text:outline-level="1">7. Cluster Death</text:h>
      <text:p text:style-name="P6">Também existe o fenômeno contrário.</text:p>
      <text:p text:style-name="P22"/>
      <text:p text:style-name="P6">Dia 1</text:p>
      <text:section text:style-name="Sect1" text:name="Seção22">
        <text:p text:style-name="P30"><text:bookmark text:name="code-block-viewer Copia 21"/><text:span text:style-name="Source_20_Text">A</text:span></text:p>
        <text:p text:style-name="P31"><text:span text:style-name="Source_20_Text">B</text:span></text:p>
        <text:p text:style-name="P31"><text:span text:style-name="Source_20_Text">C</text:span></text:p>
        <text:p text:style-name="P32"><text:span text:style-name="Source_20_Text">D</text:span></text:p>
      </text:section>
      <text:p text:style-name="P22"><text:soft-page-break/></text:p>
      <text:p text:style-name="P6">Dia 2</text:p>
      <text:section text:style-name="Sect1" text:name="Seção23">
        <text:p text:style-name="P30"><text:bookmark text:name="code-block-viewer Copia 22"/><text:span text:style-name="Source_20_Text">A</text:span></text:p>
        <text:p text:style-name="P31"><text:span text:style-name="Source_20_Text">B</text:span></text:p>
        <text:p text:style-name="P32"><text:span text:style-name="Source_20_Text">C</text:span></text:p>
      </text:section>
      <text:p text:style-name="P22"/>
      <text:p text:style-name="P6">Cluster D desapareceu.</text:p>
      <text:p text:style-name="P6">Pode indicar:</text:p>
      <text:list text:style-name="L10">
        <text:list-item>
          <text:p text:style-name="P35">assunto perdeu relevância </text:p>
        </text:list-item>
        <text:list-item>
          <text:p text:style-name="P35">problema resolvido </text:p>
        </text:list-item>
        <text:list-item>
          <text:p text:style-name="P36">hype terminou </text:p>
        </text:list-item>
      </text:list>
      <text:p text:style-name="P22"/>
      <text:h text:style-name="P9" text:outline-level="1">8. Cluster Split</text:h>
      <text:p text:style-name="P6">Muito comum em comentários.</text:p>
      <text:p text:style-name="P22"/>
      <text:p text:style-name="P6">Dia 1</text:p>
      <text:section text:style-name="Sect1" text:name="Seção24">
        <text:p text:style-name="P33"><text:bookmark text:name="code-block-viewer Copia 23"/><text:span text:style-name="Source_20_Text">Cluster A</text:span></text:p>
      </text:section>
      <text:p text:style-name="P6">Tema:</text:p>
      <text:section text:style-name="Sect1" text:name="Seção25">
        <text:p text:style-name="P33"><text:bookmark text:name="code-block-viewer Copia 24"/><text:span text:style-name="Source_20_Text">Kafka</text:span></text:p>
      </text:section>
      <text:p text:style-name="P22"/>
      <text:p text:style-name="P6">Dia 10</text:p>
      <text:p text:style-name="P6">A audiência cresce.</text:p>
      <text:p text:style-name="P6">Cluster A divide-se em:</text:p>
      <text:section text:style-name="Sect1" text:name="Seção26">
        <text:p text:style-name="P30"><text:bookmark text:name="code-block-viewer Copia 25"/><text:span text:style-name="Source_20_Text">Kafka Connect</text:span></text:p>
        <text:p text:style-name="P32"><text:span text:style-name="Source_20_Text">Kafka Streams</text:span></text:p>
      </text:section>
      <text:p text:style-name="P22"/>
      <text:p text:style-name="P6">Visualmente:</text:p>
      <text:section text:style-name="Sect1" text:name="Seção27">
        <text:p text:style-name="P30"><text:bookmark text:name="code-block-viewer Copia 26"/><text:span text:style-name="Source_20_Text">A</text:span></text:p>
        <text:p text:style-name="P31"><text:span text:style-name="Source_20_Text">│</text:span></text:p>
        <text:p text:style-name="P31"><text:span text:style-name="Source_20_Text">├── A1</text:span></text:p>
        <text:p text:style-name="P32"><text:span text:style-name="Source_20_Text">└── A2</text:span></text:p>
      </text:section>
      <text:p text:style-name="P22"/>
      <text:p text:style-name="P6">Isso é um indicador de maturidade da comunidade.</text:p>
      <text:p text:style-name="P22"/>
      <text:h text:style-name="P9" text:outline-level="1"><text:soft-page-break/>9. Cluster Merge</text:h>
      <text:p text:style-name="P6">O inverso.</text:p>
      <text:p text:style-name="P22"/>
      <text:p text:style-name="P6">Dia 1</text:p>
      <text:section text:style-name="Sect1" text:name="Seção28">
        <text:p text:style-name="P30"><text:bookmark text:name="code-block-viewer Copia 27"/><text:span text:style-name="Source_20_Text">Cluster Docker</text:span></text:p>
        <text:p text:style-name="P32"><text:span text:style-name="Source_20_Text">Cluster Kubernetes</text:span></text:p>
      </text:section>
      <text:p text:style-name="P22"/>
      <text:p text:style-name="P6">Dia 20</text:p>
      <text:section text:style-name="Sect1" text:name="Seção29">
        <text:p text:style-name="P33"><text:bookmark text:name="code-block-viewer Copia 28"/><text:span text:style-name="Source_20_Text">Cluster DevOps</text:span></text:p>
      </text:section>
      <text:p text:style-name="P22"/>
      <text:p text:style-name="P6">O sistema detecta:</text:p>
      <text:section text:style-name="Sect1" text:name="Seção30">
        <text:p text:style-name="P33"><text:bookmark text:name="code-block-viewer Copia 29"/><text:span text:style-name="Source_20_Text">Docker + Kubernetes → DevOps</text:span></text:p>
      </text:section>
      <text:p text:style-name="P22"/>
      <text:h text:style-name="P9" text:outline-level="1">10. Métricas para armazenar na camada ml/drift_metrics</text:h>
      <text:p text:style-name="P6">Uma tabela diária poderia ser: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Data</text:p>
            </table:table-cell>
            <table:table-cell table:style-name="Tabela6.A1" office:value-type="string">
              <text:p text:style-name="Table_20_Heading">Métrica</text:p>
            </table:table-cell>
            <table:table-cell table:style-name="Tabela6.A1" office:value-type="string">
              <text:p text:style-name="Table_20_Heading">Valor</text:p>
            </table:table-cell>
          </table:table-row>
        </table:table-header-rows>
        <table:table-row>
          <table:table-cell table:style-name="Tabela6.A1" office:value-type="string">
            <text:p text:style-name="Table_20_Contents">2026-05-01</text:p>
          </table:table-cell>
          <table:table-cell table:style-name="Tabela6.A1" office:value-type="string">
            <text:p text:style-name="Table_20_Contents">total_comments</text:p>
          </table:table-cell>
          <table:table-cell table:style-name="Tabela6.A1" office:value-type="string">
            <text:p text:style-name="Table_20_Contents">4200</text:p>
          </table:table-cell>
        </table:table-row>
        <table:table-row>
          <table:table-cell table:style-name="Tabela6.A1" office:value-type="string">
            <text:p text:style-name="Table_20_Contents">2026-05-01</text:p>
          </table:table-cell>
          <table:table-cell table:style-name="Tabela6.A1" office:value-type="string">
            <text:p text:style-name="Table_20_Contents">num_clusters</text:p>
          </table:table-cell>
          <table:table-cell table:style-name="Tabela6.A1" office:value-type="string">
            <text:p text:style-name="Table_20_Contents">8</text:p>
          </table:table-cell>
        </table:table-row>
        <table:table-row>
          <table:table-cell table:style-name="Tabela6.A1" office:value-type="string">
            <text:p text:style-name="Table_20_Contents">2026-05-01</text:p>
          </table:table-cell>
          <table:table-cell table:style-name="Tabela6.A1" office:value-type="string">
            <text:p text:style-name="Table_20_Contents">noise_ratio</text:p>
          </table:table-cell>
          <table:table-cell table:style-name="Tabela6.A1" office:value-type="string">
            <text:p text:style-name="Table_20_Contents">0.12</text:p>
          </table:table-cell>
        </table:table-row>
        <table:table-row>
          <table:table-cell table:style-name="Tabela6.A1" office:value-type="string">
            <text:p text:style-name="Table_20_Contents">2026-05-01</text:p>
          </table:table-cell>
          <table:table-cell table:style-name="Tabela6.A1" office:value-type="string">
            <text:p text:style-name="Table_20_Contents">global_drift</text:p>
          </table:table-cell>
          <table:table-cell table:style-name="Tabela6.A1" office:value-type="string">
            <text:p text:style-name="Table_20_Contents">0.18</text:p>
          </table:table-cell>
        </table:table-row>
        <table:table-row>
          <table:table-cell table:style-name="Tabela6.A1" office:value-type="string">
            <text:p text:style-name="Table_20_Contents">2026-05-01</text:p>
          </table:table-cell>
          <table:table-cell table:style-name="Tabela6.A1" office:value-type="string">
            <text:p text:style-name="Table_20_Contents">new_cluster_ratio</text:p>
          </table:table-cell>
          <table:table-cell table:style-name="Tabela6.A1" office:value-type="string">
            <text:p text:style-name="Table_20_Contents">0.25</text:p>
          </table:table-cell>
        </table:table-row>
        <table:table-row>
          <table:table-cell table:style-name="Tabela6.A1" office:value-type="string">
            <text:p text:style-name="Table_20_Contents">2026-05-01</text:p>
          </table:table-cell>
          <table:table-cell table:style-name="Tabela6.A1" office:value-type="string">
            <text:p text:style-name="Table_20_Contents">dead_cluster_ratio</text:p>
          </table:table-cell>
          <table:table-cell table:style-name="Tabela6.A1" office:value-type="string">
            <text:p text:style-name="Table_20_Contents">0.10</text:p>
          </table:table-cell>
        </table:table-row>
      </table:table>
      <text:p text:style-name="P22"/>
      <text:h text:style-name="P9" text:outline-level="1">11. Registrando no MLflow</text:h>
      <text:p text:style-name="P6">MLflow</text:p>
      <text:section text:style-name="Sect1" text:name="Seção31">
        <text:p text:style-name="P30"><text:bookmark text:name="code-block-viewer Copia 30"/><text:span text:style-name="Source_20_Text">import mlflow</text:span></text:p>
        <text:p text:style-name="P31"><text:span text:style-name="Source_20_Text">mlflow.log_metric(</text:span></text:p>
        <text:p text:style-name="P31"><text:span text:style-name="Source_20_Text"><text:s text:c="4"/>"global_drift",</text:span></text:p>
        <text:p text:style-name="P31"><text:span text:style-name="Source_20_Text"><text:s text:c="4"/>global_drift</text:span></text:p>
        <text:p text:style-name="P31"><text:span text:style-name="Source_20_Text">)</text:span></text:p>
        <text:p text:style-name="P31"><text:span text:style-name="Source_20_Text">mlflow.log_metric(</text:span></text:p>
        <text:p text:style-name="P31"><text:span text:style-name="Source_20_Text"><text:s text:c="4"/>"new_cluster_ratio",</text:span></text:p>
        <text:p text:style-name="P31"><text:span text:style-name="Source_20_Text"><text:s text:c="4"/>new_cluster_ratio</text:span></text:p>
        <text:p text:style-name="P31"><text:span text:style-name="Source_20_Text">)</text:span></text:p>
        <text:p text:style-name="P31"><text:span text:style-name="Source_20_Text">mlflow.log_metric(</text:span></text:p>
        <text:p text:style-name="P31"><text:span text:style-name="Source_20_Text"><text:s text:c="4"/>"dead_cluster_ratio",</text:span></text:p>
        <text:p text:style-name="P31"><text:soft-page-break/><text:span text:style-name="Source_20_Text"><text:s text:c="4"/>dead_cluster_ratio</text:span></text:p>
        <text:p text:style-name="P31"><text:span text:style-name="Source_20_Text">)</text:span></text:p>
        <text:p text:style-name="P31"><text:span text:style-name="Source_20_Text">mlflow.log_metric(</text:span></text:p>
        <text:p text:style-name="P31"><text:span text:style-name="Source_20_Text"><text:s text:c="4"/>"avg_similarity",</text:span></text:p>
        <text:p text:style-name="P31"><text:span text:style-name="Source_20_Text"><text:s text:c="4"/>avg_similarity</text:span></text:p>
        <text:p text:style-name="P32"><text:span text:style-name="Source_20_Text">)</text:span></text:p>
      </text:section>
      <text:p text:style-name="P22"/>
      <text:h text:style-name="P9" text:outline-level="1">12. Métrica mais poderosa para o dashboard</text:h>
      <text:p text:style-name="P6">No dashboard do Apache Superset, eu destacaria:</text:p>
      <text:section text:style-name="Sect1" text:name="Seção32">
        <text:p text:style-name="P30"><text:bookmark text:name="code-block-viewer Copia 31"/><text:span text:style-name="Source_20_Text">Audience Stability Index (ASI)</text:span></text:p>
        <text:p text:style-name="P32"><text:span text:style-name="Source_20_Text">ASI = média das similaridades dos clusters</text:span></text:p>
      </text:section>
      <text:p text:style-name="P6">Exemplo:</text:p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Table_20_Heading">Dia</text:p>
            </table:table-cell>
            <table:table-cell table:style-name="Tabela7.A1" office:value-type="string">
              <text:p text:style-name="Table_20_Heading">ASI</text:p>
            </table:table-cell>
          </table:table-row>
        </table:table-header-rows>
        <table:table-row>
          <table:table-cell table:style-name="Tabela7.A1" office:value-type="string">
            <text:p text:style-name="Table_20_Contents">01</text:p>
          </table:table-cell>
          <table:table-cell table:style-name="Tabela7.A1" office:value-type="string">
            <text:p text:style-name="Table_20_Contents">0.94</text:p>
          </table:table-cell>
        </table:table-row>
        <table:table-row>
          <table:table-cell table:style-name="Tabela7.A1" office:value-type="string">
            <text:p text:style-name="Table_20_Contents">02</text:p>
          </table:table-cell>
          <table:table-cell table:style-name="Tabela7.A1" office:value-type="string">
            <text:p text:style-name="Table_20_Contents">0.93</text:p>
          </table:table-cell>
        </table:table-row>
        <table:table-row>
          <table:table-cell table:style-name="Tabela7.A1" office:value-type="string">
            <text:p text:style-name="Table_20_Contents">03</text:p>
          </table:table-cell>
          <table:table-cell table:style-name="Tabela7.A1" office:value-type="string">
            <text:p text:style-name="Table_20_Contents">0.92</text:p>
          </table:table-cell>
        </table:table-row>
        <table:table-row>
          <table:table-cell table:style-name="Tabela7.A1" office:value-type="string">
            <text:p text:style-name="Table_20_Contents">04</text:p>
          </table:table-cell>
          <table:table-cell table:style-name="Tabela7.A1" office:value-type="string">
            <text:p text:style-name="Table_20_Contents">0.65</text:p>
          </table:table-cell>
        </table:table-row>
      </table:table>
      <text:p text:style-name="P6">O dia 04 sinaliza uma mudança relevante na audiência.</text:p>
      <text:p text:style-name="P6">Essa métrica é simples de explicar para áreas de negócio e resume, em um único número, o quanto a audiência permaneceu semelhante ao comportamento observado anteriorment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6.2.2.2$Linux_X86_64 LibreOffice_project/620$Build-2</meta:generator>
    <dc:date>2026-05-30T22:25:17.132756978</dc:date>
    <meta:editing-duration>PT13M40S</meta:editing-duration>
    <meta:editing-cycles>1</meta:editing-cycles>
    <meta:document-statistic meta:table-count="7" meta:image-count="0" meta:object-count="0" meta:page-count="10" meta:paragraph-count="312" meta:word-count="873" meta:character-count="5536" meta:non-whitespace-character-count="4921"/>
  </office:meta>
</office:document-meta>
</file>