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9" style:family="table">
      <style:table-properties style:width="4.768cm" table:align="left"/>
    </style:style>
    <style:style style:name="Tabela9.A" style:family="table-column">
      <style:table-column-properties style:column-width="2.542cm"/>
    </style:style>
    <style:style style:name="Tabela9.B" style:family="table-column">
      <style:table-column-properties style:column-width="2.226cm"/>
    </style:style>
    <style:style style:name="Tabela9.A1" style:family="table-cell">
      <style:table-cell-properties style:vertical-align="middle" fo:padding="0.049cm" fo:border="none"/>
    </style:style>
    <style:style style:name="Tabela8" style:family="table">
      <style:table-properties style:width="3.701cm" table:align="left"/>
    </style:style>
    <style:style style:name="Tabela8.A" style:family="table-column">
      <style:table-column-properties style:column-width="2.542cm"/>
    </style:style>
    <style:style style:name="Tabela8.B" style:family="table-column">
      <style:table-column-properties style:column-width="1.159cm"/>
    </style:style>
    <style:style style:name="Tabela8.A1" style:family="table-cell">
      <style:table-cell-properties style:vertical-align="middle" fo:padding="0.049cm" fo:border="none"/>
    </style:style>
    <style:style style:name="Tabela1" style:family="table">
      <style:table-properties style:width="3.441cm" table:align="left"/>
    </style:style>
    <style:style style:name="Tabela1.A" style:family="table-column">
      <style:table-column-properties style:column-width="0.848cm"/>
    </style:style>
    <style:style style:name="Tabela1.B" style:family="table-column">
      <style:table-column-properties style:column-width="2.59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2.312cm" table:align="left"/>
    </style:style>
    <style:style style:name="Tabela2.A" style:family="table-column">
      <style:table-column-properties style:column-width="1.623cm"/>
    </style:style>
    <style:style style:name="Tabela2.B" style:family="table-column">
      <style:table-column-properties style:column-width="0.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2.312cm" table:align="left"/>
    </style:style>
    <style:style style:name="Tabela3.A" style:family="table-column">
      <style:table-column-properties style:column-width="1.623cm"/>
    </style:style>
    <style:style style:name="Tabela3.B" style:family="table-column">
      <style:table-column-properties style:column-width="0.6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3.701cm" table:align="left"/>
    </style:style>
    <style:style style:name="Tabela4.A" style:family="table-column">
      <style:table-column-properties style:column-width="2.542cm"/>
    </style:style>
    <style:style style:name="Tabela4.B" style:family="table-column">
      <style:table-column-properties style:column-width="1.15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4.147cm" table:align="left"/>
    </style:style>
    <style:style style:name="Tabela5.A" style:family="table-column">
      <style:table-column-properties style:column-width="1.552cm"/>
    </style:style>
    <style:style style:name="Tabela5.B" style:family="table-column">
      <style:table-column-properties style:column-width="2.59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6.759cm" table:align="left"/>
    </style:style>
    <style:style style:name="Tabela6.A" style:family="table-column">
      <style:table-column-properties style:column-width="2.185cm"/>
    </style:style>
    <style:style style:name="Tabela6.B" style:family="table-column">
      <style:table-column-properties style:column-width="3.313cm"/>
    </style:style>
    <style:style style:name="Tabela6.C" style:family="table-column">
      <style:table-column-properties style:column-width="1.261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.856cm" table:align="left"/>
    </style:style>
    <style:style style:name="Tabela7.A" style:family="table-column">
      <style:table-column-properties style:column-width="0.848cm"/>
    </style:style>
    <style:style style:name="Tabela7.B" style:family="table-column">
      <style:table-column-properties style:column-width="1.007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b0306" officeooo:paragraph-rsid="000b0306"/>
    </style:style>
    <style:style style:name="P2" style:family="paragraph" style:parent-style-name="Standard">
      <style:paragraph-properties fo:text-align="justify" style:justify-single-word="false"/>
      <style:text-properties officeooo:rsid="000b179c" officeooo:paragraph-rsid="000b0306"/>
    </style:style>
    <style:style style:name="P3" style:family="paragraph" style:parent-style-name="Standard">
      <style:paragraph-properties fo:text-align="justify" style:justify-single-word="false"/>
      <style:text-properties officeooo:rsid="000b0306" officeooo:paragraph-rsid="000b0306"/>
    </style:style>
    <style:style style:name="P4" style:family="paragraph" style:parent-style-name="Standard">
      <style:text-properties officeooo:rsid="000b179c" officeooo:paragraph-rsid="000b179c"/>
    </style:style>
    <style:style style:name="P5" style:family="paragraph" style:parent-style-name="Standard">
      <style:text-properties officeooo:rsid="000c072e" officeooo:paragraph-rsid="000c072e"/>
    </style:style>
    <style:style style:name="P6" style:family="paragraph" style:parent-style-name="Standard">
      <style:text-properties officeooo:rsid="000f7203" officeooo:paragraph-rsid="000f7203"/>
    </style:style>
    <style:style style:name="P7" style:family="paragraph" style:parent-style-name="Standard">
      <style:text-properties officeooo:rsid="000f8eb2" officeooo:paragraph-rsid="000f8eb2"/>
    </style:style>
    <style:style style:name="P8" style:family="paragraph" style:parent-style-name="Standard">
      <style:text-properties fo:font-weight="bold" officeooo:rsid="000f8eb2" officeooo:paragraph-rsid="000f8eb2" style:font-weight-asian="bold" style:font-weight-complex="bold"/>
    </style:style>
    <style:style style:name="P9" style:family="paragraph" style:parent-style-name="Standard">
      <style:text-properties officeooo:paragraph-rsid="00107dec"/>
    </style:style>
    <style:style style:name="P10" style:family="paragraph" style:parent-style-name="Standard">
      <style:text-properties officeooo:rsid="00107dec" officeooo:paragraph-rsid="00107dec"/>
    </style:style>
    <style:style style:name="P11" style:family="paragraph" style:parent-style-name="Preformatted_20_Text">
      <style:text-properties officeooo:paragraph-rsid="00107dec"/>
    </style:style>
    <style:style style:name="P12" style:family="paragraph" style:parent-style-name="Heading_20_2">
      <style:text-properties officeooo:paragraph-rsid="00107dec"/>
    </style:style>
    <style:style style:name="P13" style:family="paragraph" style:parent-style-name="Text_20_body">
      <style:text-properties officeooo:paragraph-rsid="00112b3a"/>
    </style:style>
    <style:style style:name="P14" style:family="paragraph" style:parent-style-name="Preformatted_20_Text">
      <style:text-properties fo:font-weight="bold" officeooo:paragraph-rsid="00107dec" style:font-weight-asian="bold" style:font-weight-complex="bold"/>
    </style:style>
    <style:style style:name="P15" style:family="paragraph" style:parent-style-name="Heading_20_2">
      <style:text-properties style:font-name="Liberation Mono" fo:font-size="10pt" officeooo:paragraph-rsid="00112b3a" style:font-name-asian="Noto Sans Mono CJK SC" style:font-size-asian="10pt" style:font-name-complex="Liberation Mono" style:font-size-complex="10pt"/>
    </style:style>
    <style:style style:name="P16" style:family="paragraph" style:parent-style-name="Text_20_body">
      <style:text-properties style:font-name="Liberation Mono" fo:font-size="10pt" fo:font-weight="normal" officeooo:paragraph-rsid="00112b3a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Text_20_body">
      <style:text-properties style:font-name="Liberation Mono" fo:font-size="10pt" fo:font-weight="bold" officeooo:paragraph-rsid="00112b3a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Text_20_body">
      <style:text-properties style:font-name="Liberation Mono" fo:font-size="10pt" officeooo:paragraph-rsid="00112b3a" style:font-name-asian="Noto Sans Mono CJK SC" style:font-size-asian="10pt" style:font-name-complex="Liberation Mono" style:font-size-complex="10pt"/>
    </style:style>
    <style:style style:name="P19" style:family="paragraph" style:parent-style-name="Heading_20_2">
      <style:text-properties style:font-name="Liberation Mono" fo:font-size="10pt" officeooo:paragraph-rsid="00107dec" style:font-name-asian="Noto Sans Mono CJK SC" style:font-size-asian="10pt" style:font-name-complex="Liberation Mono" style:font-size-complex="10pt"/>
    </style:style>
    <style:style style:name="P20" style:family="paragraph" style:parent-style-name="Text_20_body">
      <style:text-properties style:font-name="Liberation Mono" fo:font-size="10pt" officeooo:paragraph-rsid="00107dec" style:font-name-asian="Noto Sans Mono CJK SC" style:font-size-asian="10pt" style:font-name-complex="Liberation Mono" style:font-size-complex="10pt"/>
    </style:style>
    <style:style style:name="P21" style:family="paragraph" style:parent-style-name="Text_20_body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23" style:family="paragraph" style:parent-style-name="Preformatted_20_Text">
      <style:paragraph-properties fo:margin-top="0cm" fo:margin-bottom="0.247cm" style:contextual-spacing="false" fo:line-height="115%"/>
    </style:style>
    <style:style style:name="P24" style:family="paragraph" style:parent-style-name="Heading_20_2">
      <style:text-properties officeooo:paragraph-rsid="00112b3a"/>
    </style:style>
    <style:style style:name="P25" style:family="paragraph" style:parent-style-name="Heading_20_2">
      <style:text-properties fo:font-size="12pt" officeooo:paragraph-rsid="00112b3a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1"/>
    <style:style style:name="P28" style:family="paragraph" style:parent-style-name="Heading_20_2">
      <style:paragraph-properties fo:margin-top="0cm" fo:margin-bottom="0.247cm" style:contextual-spacing="false" fo:line-height="115%"/>
    </style:style>
    <style:style style:name="P29" style:family="paragraph" style:parent-style-name="Text_20_body" style:list-style-name="L2"/>
    <style:style style:name="P30" style:family="paragraph" style:parent-style-name="Standard">
      <style:text-properties officeooo:rsid="00119cc1" officeooo:paragraph-rsid="00119cc1"/>
    </style:style>
    <style:style style:name="P31" style:family="paragraph" style:parent-style-name="Standard">
      <style:text-properties officeooo:paragraph-rsid="00119cc1"/>
    </style:style>
    <style:style style:name="P32" style:family="paragraph" style:parent-style-name="Standard">
      <style:text-properties fo:font-weight="bold" officeooo:rsid="00119cc1" officeooo:paragraph-rsid="001256d2" style:font-weight-asian="bold" style:font-weight-complex="bold"/>
    </style:style>
    <style:style style:name="P33" style:family="paragraph" style:parent-style-name="Standard">
      <style:text-properties officeooo:rsid="00119cc1" officeooo:paragraph-rsid="001256d2"/>
    </style:style>
    <style:style style:name="P34" style:family="paragraph" style:parent-style-name="Standard">
      <style:text-properties officeooo:paragraph-rsid="0011d9af"/>
    </style:style>
    <style:style style:name="P35" style:family="paragraph" style:parent-style-name="Standard">
      <style:text-properties officeooo:rsid="0011d9af" officeooo:paragraph-rsid="0011d9af"/>
    </style:style>
    <style:style style:name="P36" style:family="paragraph" style:parent-style-name="Heading_20_2">
      <style:text-properties officeooo:rsid="0011d9af" officeooo:paragraph-rsid="0011d9af"/>
    </style:style>
    <style:style style:name="P37" style:family="paragraph" style:parent-style-name="Text_20_body">
      <style:text-properties officeooo:rsid="0011d9af"/>
    </style:style>
    <style:style style:name="P38" style:family="paragraph" style:parent-style-name="Text_20_body" style:list-style-name="L3">
      <style:paragraph-properties fo:margin-top="0cm" fo:margin-bottom="0cm" style:contextual-spacing="false"/>
      <style:text-properties officeooo:rsid="0011d9af"/>
    </style:style>
    <style:style style:name="P39" style:family="paragraph" style:parent-style-name="Text_20_body" style:list-style-name="L3">
      <style:text-properties officeooo:rsid="0011d9af"/>
    </style:style>
    <style:style style:name="P40" style:family="paragraph" style:parent-style-name="Standard">
      <style:text-properties fo:font-weight="bold" officeooo:paragraph-rsid="00119cc1" style:font-weight-asian="bold" style:font-weight-complex="bold"/>
    </style:style>
    <style:style style:name="P41" style:family="paragraph" style:parent-style-name="Standard">
      <style:text-properties fo:font-weight="bold" officeooo:rsid="0011d9af" officeooo:paragraph-rsid="0011d9af" style:font-weight-asian="bold" style:font-weight-complex="bold"/>
    </style:style>
    <style:style style:name="P42" style:family="paragraph" style:parent-style-name="Standard">
      <style:text-properties fo:font-weight="bold" officeooo:rsid="0012c841" officeooo:paragraph-rsid="0012c841" style:font-weight-asian="bold" style:font-weight-complex="bold"/>
    </style:style>
    <style:style style:name="P43" style:family="paragraph" style:parent-style-name="Text_20_body">
      <style:text-properties fo:font-weight="normal" officeooo:rsid="0012c841" officeooo:paragraph-rsid="0012c841" style:font-weight-asian="normal" style:font-weight-complex="normal"/>
    </style:style>
    <style:style style:name="P44" style:family="paragraph" style:parent-style-name="Standard">
      <style:text-properties fo:font-weight="normal" officeooo:rsid="0012c841" officeooo:paragraph-rsid="0012c841" style:font-weight-asian="normal" style:font-weight-complex="normal"/>
    </style:style>
    <style:style style:name="P45" style:family="paragraph" style:parent-style-name="Heading_20_1">
      <style:text-properties fo:font-weight="normal" officeooo:rsid="0012c841" officeooo:paragraph-rsid="0012c841" style:font-weight-asian="normal" style:font-weight-complex="normal"/>
    </style:style>
    <style:style style:name="P46" style:family="paragraph" style:parent-style-name="Text_20_body">
      <style:text-properties officeooo:rsid="0012c841"/>
    </style:style>
    <style:style style:name="P47" style:family="paragraph" style:parent-style-name="Heading_20_3">
      <style:text-properties fo:font-weight="normal" officeooo:rsid="0012c841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officeooo:rsid="0012c841"/>
    </style:style>
    <style:style style:name="P49" style:family="paragraph" style:parent-style-name="Preformatted_20_Text">
      <style:text-properties officeooo:rsid="0012c841"/>
    </style:style>
    <style:style style:name="P50" style:family="paragraph" style:parent-style-name="Preformatted_20_Text">
      <style:paragraph-properties fo:margin-top="0cm" fo:margin-bottom="0.499cm" style:contextual-spacing="false"/>
      <style:text-properties officeooo:rsid="0012c841"/>
    </style:style>
    <style:style style:name="P51" style:family="paragraph" style:parent-style-name="Horizontal_20_Line">
      <style:text-properties officeooo:rsid="0012c841"/>
    </style:style>
    <style:style style:name="P52" style:family="paragraph" style:parent-style-name="Text_20_body">
      <style:text-properties officeooo:rsid="0011d9af" officeooo:paragraph-rsid="0011d9af"/>
    </style:style>
    <style:style style:name="P53" style:family="paragraph" style:parent-style-name="Text_20_body">
      <style:text-properties officeooo:paragraph-rsid="0012c841"/>
    </style:style>
    <style:style style:name="P54" style:family="paragraph" style:parent-style-name="Text_20_body">
      <style:text-properties officeooo:rsid="0011e495" officeooo:paragraph-rsid="0011e495"/>
    </style:style>
    <style:style style:name="P55" style:family="paragraph" style:parent-style-name="Standard">
      <style:text-properties officeooo:rsid="0011d9af" officeooo:paragraph-rsid="0011e495"/>
    </style:style>
    <style:style style:name="P56" style:family="paragraph" style:parent-style-name="Heading_20_2">
      <style:text-properties officeooo:rsid="0011d9af" officeooo:paragraph-rsid="0011e495"/>
    </style:style>
    <style:style style:name="P57" style:family="paragraph" style:parent-style-name="Standard">
      <style:text-properties officeooo:rsid="0011e495" officeooo:paragraph-rsid="0011e495"/>
    </style:style>
    <style:style style:name="P58" style:family="paragraph" style:parent-style-name="Heading_20_3">
      <style:paragraph-properties fo:margin-top="0cm" fo:margin-bottom="0.247cm" style:contextual-spacing="false" fo:line-height="115%"/>
      <style:text-properties officeooo:rsid="0011d9af"/>
    </style:style>
    <style:style style:name="P59" style:family="paragraph" style:parent-style-name="Horizontal_20_Line">
      <style:paragraph-properties fo:margin-top="0cm" fo:margin-bottom="0.247cm" style:contextual-spacing="false" fo:line-height="115%"/>
      <style:text-properties officeooo:rsid="0011d9af"/>
    </style:style>
    <style:style style:name="P60" style:family="paragraph" style:parent-style-name="Preformatted_20_Text">
      <style:paragraph-properties fo:margin-top="0cm" fo:margin-bottom="0.247cm" style:contextual-spacing="false" fo:line-height="115%"/>
      <style:text-properties officeooo:rsid="0011d9af"/>
    </style:style>
    <style:style style:name="P61" style:family="paragraph" style:parent-style-name="Text_20_body" style:list-style-name="L4">
      <style:paragraph-properties fo:margin-top="0cm" fo:margin-bottom="0cm" style:contextual-spacing="false"/>
      <style:text-properties officeooo:rsid="0011d9af"/>
    </style:style>
    <style:style style:name="P62" style:family="paragraph" style:parent-style-name="Text_20_body" style:list-style-name="L4">
      <style:text-properties officeooo:rsid="0011d9af"/>
    </style:style>
    <style:style style:name="P63" style:family="paragraph" style:parent-style-name="Standard">
      <style:text-properties officeooo:paragraph-rsid="000c072e"/>
    </style:style>
    <style:style style:name="P64" style:family="paragraph" style:parent-style-name="Standard">
      <style:paragraph-properties fo:margin-top="0cm" fo:margin-bottom="0.499cm" style:contextual-spacing="false"/>
      <style:text-properties officeooo:paragraph-rsid="000c072e"/>
    </style:style>
    <style:style style:name="P65" style:family="paragraph" style:parent-style-name="Heading_20_1">
      <style:text-properties officeooo:rsid="000c072e" officeooo:paragraph-rsid="000c072e"/>
    </style:style>
    <style:style style:name="P66" style:family="paragraph" style:parent-style-name="Text_20_body">
      <style:text-properties officeooo:rsid="000c072e"/>
    </style:style>
    <style:style style:name="P67" style:family="paragraph" style:parent-style-name="Text_20_body" style:list-style-name="L5">
      <style:paragraph-properties fo:margin-top="0cm" fo:margin-bottom="0cm" style:contextual-spacing="false"/>
      <style:text-properties officeooo:rsid="000c072e"/>
    </style:style>
    <style:style style:name="P68" style:family="paragraph" style:parent-style-name="Text_20_body" style:list-style-name="L5">
      <style:text-properties officeooo:rsid="000c072e"/>
    </style:style>
    <style:style style:name="P69" style:family="paragraph" style:parent-style-name="Heading_20_1">
      <style:text-properties officeooo:rsid="000c072e"/>
    </style:style>
    <style:style style:name="P70" style:family="paragraph" style:parent-style-name="Text_20_body" style:list-style-name="L6">
      <style:paragraph-properties fo:margin-top="0cm" fo:margin-bottom="0cm" style:contextual-spacing="false"/>
      <style:text-properties officeooo:rsid="000c072e"/>
    </style:style>
    <style:style style:name="P71" style:family="paragraph" style:parent-style-name="Text_20_body" style:list-style-name="L6">
      <style:text-properties officeooo:rsid="000c072e"/>
    </style:style>
    <style:style style:name="P72" style:family="paragraph" style:parent-style-name="Text_20_body" style:list-style-name="L7">
      <style:paragraph-properties fo:margin-top="0cm" fo:margin-bottom="0cm" style:contextual-spacing="false"/>
      <style:text-properties officeooo:rsid="000c072e"/>
    </style:style>
    <style:style style:name="P73" style:family="paragraph" style:parent-style-name="Text_20_body" style:list-style-name="L7">
      <style:text-properties officeooo:rsid="000c072e"/>
    </style:style>
    <style:style style:name="P74" style:family="paragraph" style:parent-style-name="Text_20_body" style:list-style-name="L8">
      <style:paragraph-properties fo:margin-top="0cm" fo:margin-bottom="0cm" style:contextual-spacing="false"/>
      <style:text-properties officeooo:rsid="000c072e"/>
    </style:style>
    <style:style style:name="P75" style:family="paragraph" style:parent-style-name="Text_20_body" style:list-style-name="L8">
      <style:text-properties officeooo:rsid="000c072e"/>
    </style:style>
    <style:style style:name="P76" style:family="paragraph" style:parent-style-name="Text_20_body" style:list-style-name="L9">
      <style:paragraph-properties fo:margin-top="0cm" fo:margin-bottom="0cm" style:contextual-spacing="false"/>
      <style:text-properties officeooo:rsid="000c072e"/>
    </style:style>
    <style:style style:name="P77" style:family="paragraph" style:parent-style-name="Text_20_body" style:list-style-name="L9">
      <style:text-properties officeooo:rsid="000c072e"/>
    </style:style>
    <style:style style:name="P78" style:family="paragraph" style:parent-style-name="Heading_20_2">
      <style:text-properties officeooo:rsid="000c072e"/>
    </style:style>
    <style:style style:name="P79" style:family="paragraph" style:parent-style-name="Heading_20_3">
      <style:text-properties officeooo:rsid="000c072e"/>
    </style:style>
    <style:style style:name="P80" style:family="paragraph" style:parent-style-name="Text_20_body" style:list-style-name="L10">
      <style:paragraph-properties fo:margin-top="0cm" fo:margin-bottom="0cm" style:contextual-spacing="false"/>
      <style:text-properties officeooo:rsid="000c072e"/>
    </style:style>
    <style:style style:name="P81" style:family="paragraph" style:parent-style-name="Text_20_body" style:list-style-name="L10">
      <style:text-properties officeooo:rsid="000c072e"/>
    </style:style>
    <style:style style:name="P82" style:family="paragraph" style:parent-style-name="Horizontal_20_Line">
      <style:text-properties officeooo:rsid="000c072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officeooo:rsid="000c072e"/>
    </style:style>
    <style:style style:name="P84" style:family="paragraph" style:parent-style-name="Text_20_body" style:list-style-name="L11">
      <style:text-properties officeooo:rsid="000c072e"/>
    </style:style>
    <style:style style:name="P85" style:family="paragraph" style:parent-style-name="Text_20_body">
      <style:text-properties officeooo:rsid="000c072e" officeooo:paragraph-rsid="000c072e"/>
    </style:style>
    <style:style style:name="P86" style:family="paragraph" style:parent-style-name="Text_20_body" style:list-style-name="L12">
      <style:paragraph-properties fo:margin-top="0cm" fo:margin-bottom="0cm" style:contextual-spacing="false"/>
      <style:text-properties officeooo:rsid="000c072e"/>
    </style:style>
    <style:style style:name="P87" style:family="paragraph" style:parent-style-name="Text_20_body" style:list-style-name="L12">
      <style:text-properties officeooo:rsid="000c072e"/>
    </style:style>
    <style:style style:name="P88" style:family="paragraph" style:parent-style-name="Text_20_body" style:list-style-name="L13">
      <style:paragraph-properties fo:margin-top="0cm" fo:margin-bottom="0cm" style:contextual-spacing="false"/>
      <style:text-properties officeooo:rsid="000c072e"/>
    </style:style>
    <style:style style:name="P89" style:family="paragraph" style:parent-style-name="Text_20_body" style:list-style-name="L13">
      <style:text-properties officeooo:rsid="000c072e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0c072e"/>
    </style:style>
    <style:style style:name="P91" style:family="paragraph" style:parent-style-name="Preformatted_20_Text">
      <style:text-properties officeooo:rsid="000c072e"/>
    </style:style>
    <style:style style:name="P92" style:family="paragraph" style:parent-style-name="Preformatted_20_Text">
      <style:paragraph-properties fo:margin-top="0cm" fo:margin-bottom="0.499cm" style:contextual-spacing="false"/>
      <style:text-properties officeooo:rsid="000c072e"/>
    </style:style>
    <style:style style:name="P9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0c072e"/>
    </style:style>
    <style:style style:name="P94" style:family="paragraph" style:parent-style-name="Quotations">
      <style:text-properties officeooo:rsid="000c072e"/>
    </style:style>
    <style:style style:name="P95" style:family="paragraph" style:parent-style-name="Text_20_body" style:list-style-name="L14">
      <style:paragraph-properties fo:margin-top="0cm" fo:margin-bottom="0cm" style:contextual-spacing="false"/>
      <style:text-properties officeooo:rsid="000c072e"/>
    </style:style>
    <style:style style:name="P96" style:family="paragraph" style:parent-style-name="Text_20_body" style:list-style-name="L14">
      <style:text-properties officeooo:rsid="000c072e"/>
    </style:style>
    <style:style style:name="T1" style:family="text">
      <style:text-properties officeooo:rsid="000b17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dec" style:font-weight-asian="bold" style:font-weight-complex="bold"/>
    </style:style>
    <style:style style:name="T4" style:family="text">
      <style:text-properties officeooo:rsid="00107dec"/>
    </style:style>
    <style:style style:name="T5" style:family="text">
      <style:text-properties style:font-name="Liberation Mono" fo:font-size="10pt" officeooo:rsid="00107dec" style:font-name-asian="Noto Sans Mono CJK SC" style:font-size-asian="10pt" style:font-name-complex="Liberation Mono" style:font-size-complex="10pt"/>
    </style:style>
    <style:style style:name="T6" style:family="text">
      <style:text-properties fo:font-size="12pt" fo:font-weight="bold" officeooo:rsid="00107dec" style:font-size-asian="12pt" style:font-weight-asian="bold" style:font-size-complex="12pt" style:font-weight-complex="bold"/>
    </style:style>
    <style:style style:name="T7" style:family="text">
      <style:text-properties fo:font-size="12pt" officeooo:rsid="00107dec" style:font-size-asian="12pt" style:font-size-complex="12pt"/>
    </style:style>
    <style:style style:name="T8" style:family="text">
      <style:text-properties style:font-name="Liberation Mono" fo:font-size="12pt" officeooo:rsid="00107dec" style:font-name-asian="Noto Sans Mono CJK SC" style:font-size-asian="12pt" style:font-name-complex="Liberation Mono" style:font-size-complex="12pt"/>
    </style:style>
    <style:style style:name="T9" style:family="text">
      <style:text-properties style:font-name="Liberation Mono" fo:font-size="12pt" fo:font-weight="bold" officeooo:rsid="00107dec" style:font-name-asian="Noto Sans Mono CJK SC" style:font-size-asian="12pt" style:font-weight-asian="bold" style:font-name-complex="Liberation Mono" style:font-size-complex="12pt" style:font-weight-complex="bold"/>
    </style:style>
    <style:style style:name="T10" style:family="text">
      <style:text-properties style:font-name="Liberation Mono" fo:font-size="12pt" officeooo:rsid="00112b3a" style:font-name-asian="Noto Sans Mono CJK SC" style:font-size-asian="12pt" style:font-name-complex="Liberation Mono" style:font-size-complex="12pt"/>
    </style:style>
    <style:style style:name="T11" style:family="text">
      <style:text-properties officeooo:rsid="000f720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12b3a"/>
    </style:style>
    <style:style style:name="T1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12b3a" style:font-size-asian="12pt" style:font-size-complex="12pt"/>
    </style:style>
    <style:style style:name="T17" style:family="text">
      <style:text-properties officeooo:rsid="001256d2"/>
    </style:style>
    <style:style style:name="T18" style:family="text">
      <style:text-properties officeooo:rsid="0011d9af"/>
    </style:style>
    <style:style style:name="T19" style:family="text">
      <style:text-properties officeooo:rsid="00119cc1"/>
    </style:style>
    <style:style style:name="T20" style:family="text">
      <style:text-properties officeooo:rsid="0012c841"/>
    </style:style>
    <style:style style:name="T21" style:family="text">
      <style:text-properties officeooo:rsid="0011e495"/>
    </style:style>
    <style:style style:name="T22" style:family="text">
      <style:text-properties officeooo:rsid="000c072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upamento de comentários de vários vídeos do youtube</text:p>
      <text:p text:style-name="P1"/>
      <text:p text:style-name="P1">1-<text:span text:style-name="T1">Objetivo</text:span></text:p>
      <text:p text:style-name="P1"/>
      <text:p text:style-name="P2">O objetivo desse projeto é construir um sistema que permita mapear perfis de audiências e temas recorrentes de vários canais do youtube, ao longo do tempo, usando tecnicas de machine learning e processamento de linguagem natural, além de propor uma estrutura de coleta e organização dos dados</text:p>
      <text:p text:style-name="P3"/>
      <text:p text:style-name="P1">2- <text:span text:style-name="T1">Tecnologias Usadas</text:span></text:p>
      <text:p text:style-name="P4"/>
      <text:p text:style-name="P4">Python3.11</text:p>
      <text:p text:style-name="P4">sklearn</text:p>
      <text:p text:style-name="P4">spacy</text:p>
      <text:p text:style-name="P4">apache superset</text:p>
      <text:p text:style-name="P4"/>
      <text:p text:style-name="P5">3 – Arquitetura da solução</text:p>
      <text:p text:style-name="P5"/>
      <text:p text:style-name="P6">3.1 – Requisitos</text:p>
      <text:p text:style-name="P6">3.1.1 - Requisitos Funcionais</text:p>
      <text:p text:style-name="P6"/>
      <text:p text:style-name="P7"><text:span text:style-name="T2">RF01</text:span> – Coletar comentários do youtube: O sistema deve coletar comentários de vídeos da API do youtube</text:p>
      <text:p text:style-name="P7"><text:span text:style-name="T2">RF02</text:span> - Implementar sistema de log para monitorar a extração.</text:p>
      <text:p text:style-name="P7"><text:span text:style-name="T2">RF03 – Executar coleta diária:</text:span> O sistema deve permitir a coleta diárioa de novos comentários.</text:p>
      <text:p text:style-name="P7"><text:span text:style-name="T2">RF04 – Armazenar dados brutos dos comentários na camada bronze sem transformaçã</text:span>o</text:p>
      <text:p text:style-name="P7"><text:span text:style-name="T2">RF05 – O sistema deve realizar as seguintes transformações de processamento de linguagem natural</text:span>: Limpeza textual, tokenização, lematização, remoção <text:s/>de stopwords e detecção de idioma.</text:p>
      <text:p text:style-name="P8">RF06 – Extrair entidades nomenadas:</text:p>
      <text:p text:style-name="P8">RF07 – Extrair a palavras chaves representativa dos comentários</text:p>
      <text:p text:style-name="P7"><text:span text:style-name="T2">RF08 – Gerar embeddings</text:span>: O sistema deve transformar comentários em vetores numéricos: Spacy vectors, Sentence Transformers Berts</text:p>
      <text:p text:style-name="P8">RF09 – Persistir embeddings na <text:s/>camada gold.</text:p>
      <text:p text:style-name="P7"><text:span text:style-name="T2">RF10 – Agrupar comentários: </text:span>O sistema deve executar agrupamento não supervisionado: HDBSCAN, DBSCAN, k-means.</text:p>
      <text:p text:style-name="P7"><text:span text:style-name="T2">RF11 – Gerar </text:span><text:span text:style-name="T3">Perfis</text:span><text:span text:style-name="T2"> dos clusters: </text:span><text:span text:style-name="T4">O sistema deve gerar informações agregadas para cada cluster. Ex: Quantidade de comentários, principais palavras, principais entidades</text:span></text:p>
      <text:p text:style-name="P9"><text:span text:style-name="T3">RF12 - </text:span><text:span text:style-name="T2">Gerar centróides dos clusters:</text:span> <text:span text:style-name="T4"><text:s text:c="2"/></text:span>O sistema deve calcular um vetor representativo para cada cluster.</text:p>
      <text:p text:style-name="P10"><text:span text:style-name="T2">RF13 - Realizar rastreamento temporal dos clusters</text:span>: O sistema deve identificar correspondências entre clusters de dias diferentes.</text:p>
      <text:p text:style-name="P9"><text:span text:style-name="T3">RF14 - </text:span><text:span text:style-name="T2">Detectar novos clusters</text:span>: O sistema deve identificar clusters sem correspondência histórica.</text:p>
      <text:p text:style-name="P9"><text:span text:style-name="T4">NEW_CLUSTER -&gt; </text:span>O sistema deve identificar clusters sem correspondência histórica.</text:p>
      <text:p text:style-name="P11"><text:bookmark text:name="code-block-viewer Copia 32"/><text:span text:style-name="Source_20_Text"><text:span text:style-name="T4">DEAD_CLUSTER -&gt; </text:span></text:span><text:span text:style-name="Source_20_Text"><text:span text:style-name="T5">Detectar desaparecimento de clusters</text:span></text:span></text:p>
      <text:p text:style-name="P11"><text:bookmark text:name="code-block-viewer Copia 33"/><text:span text:style-name="Source_20_Text"><text:span text:style-name="T4">SPLIT_CLUSTER -&gt; </text:span></text:span><text:span text:style-name="Source_20_Text">Detectar divisão de clusters</text:span></text:p>
      <text:p text:style-name="P11"><text:bookmark text:name="code-block-viewer Copia 34"/><text:span text:style-name="Source_20_Text">MERGE_CLUSTER -&gt;Detectar fusão de clusters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oft-page-break/><text:span text:style-name="Source_20_Text"><text:span text:style-name="T6">RF15 - Calcular métricas de drift:</text:span></text:span><text:span text:style-name="Source_20_Text"><text:span text:style-name="T7"> Similaridade dos clusters, Drift global, Drift individual</text:span></text:span></text:p>
      <text:p text:style-name="P11"><text:span text:style-name="Source_20_Text"><text:span text:style-name="T7"><text:line-break/></text:span></text:span><text:span text:style-name="Source_20_Text"><text:span text:style-name="T6">RF16 - Calcular Audience Stability Index</text:span></text:span><text:span text:style-name="Source_20_Text"><text:span text:style-name="T7">: </text:span></text:span><text:span text:style-name="Source_20_Text"><text:span text:style-name="T8">O sistema deve calcular o indicador ASI.</text:span></text:span></text:p>
      <text:p text:style-name="P11"><text:span text:style-name="Source_20_Text"><text:span text:style-name="T8"/></text:span></text:p>
      <text:p text:style-name="P11"><text:span text:style-name="Source_20_Text"><text:span text:style-name="T9">RF17 - Registrar experimentos</text:span></text:span><text:span text:style-name="Source_20_Text"><text:span text:style-name="T9">: </text:span></text:span><text:span text:style-name="Source_20_Text"><text:span text:style-name="T8">o sistema deve registrar os experimentos no mlflow</text:span></text:span></text:p>
      <text:p text:style-name="P11"><text:span text:style-name="Source_20_Text"><text:span text:style-name="T8"/></text:span></text:p>
      <text:p text:style-name="P11"><text:span text:style-name="Source_20_Text"><text:span text:style-name="T9">RF18-Registrar artefatos</text:span></text:span><text:span text:style-name="Source_20_Text"><text:span text:style-name="T8">: O sistema deve armazenar Clusters, métricas, embeddings, relatórios</text:span></text:span></text:p>
      <text:p text:style-name="P11"><text:span text:style-name="Source_20_Text"><text:span text:style-name="T8"/></text:span></text:p>
      <text:h text:style-name="P12" text:outline-level="2"><text:span text:style-name="Source_20_Text"><text:span text:style-name="T8">RF19 - Disponibilizar Dashboard: O sistema deve disponibilizar dashboards no apache superset</text:span></text:span></text:h>
      <text:p text:style-name="P13"><text:span text:style-name="Source_20_Text"><text:span text:style-name="T10">RF20 - Exibir evolução temporal:</text:span></text:span><text:span text:style-name="Source_20_Text"><text:span text:style-name="T10"> O dashboard deve exibir: Evolução dos comentários, Evolução dos clusters, </text:span></text:span><text:span text:style-name="Source_20_Text"><text:span text:style-name="T10">Evolução do drift </text:span></text:span></text:p>
      <text:p text:style-name="P13"><text:span text:style-name="Source_20_Text"><text:span text:style-name="T10">RF21 - Exibir métricas NLP: O dashboard deve exibir idiomas, sentimentos, entidades, keywords, comprimento médio dos comentários e diversidade lexical</text:span></text:span></text:p>
      <text:p text:style-name="P13"><text:span text:style-name="Source_20_Text"><text:span text:style-name="T10">RF22 - Permitir filtros analíticos</text:span></text:span></text:p>
      <text:p text:style-name="P13"><text:span text:style-name="Source_20_Text"><text:span text:style-name="T10">O dashboard deve possuir filtros de vídeos, canal, período, idioma, cluster.</text:span></text:span></text:p>
      <text:p text:style-name="P14"><text:span text:style-name="T11">3.1.2 – Requisitos não-funcionais</text:span></text:p>
      <text:p text:style-name="P11"/>
      <text:h text:style-name="P15" text:outline-level="2">RNF01 – Escalabilidade:</text:h>
      <text:h text:style-name="P15" text:outline-level="2"><text:s/><text:span text:style-name="T12">O sistema deve suportar crescimento contínuo da quantidade de comentários.</text:span></text:h>
      <text:p text:style-name="P16"/>
      <text:p text:style-name="P17">RNF02 – Reprocessamento:</text:p>
      <text:p text:style-name="P18">Deve ser possível reprocessar qualquer período histórico sem perda de dados.</text:p>
      <text:h text:style-name="P19" text:outline-level="2">RNF03 - Imutabilidade da Bronze</text:h>
      <text:p text:style-name="P20">A camada Bronze não deve sofrer alterações após gravação.</text:p>
      <text:h text:style-name="P19" text:outline-level="2">RNF04 – Auditabilidade</text:h>
      <text:p text:style-name="P18">Toda execução deve ser rastreável,<text:span text:style-name="T13">i</text:span>ncluindo modelo NLP, parâmetros,dataset utilizado.</text:p>
      <text:h text:style-name="P15" text:outline-level="2">RNF05 - Reprodutibilidade</text:h>
      <text:p text:style-name="P21">Uma execução histórica deve poder ser reproduzida.</text:p>
      <text:h text:style-name="P15" text:outline-level="2">RNF06 - Versionamento de modelos</text:h>
      <text:p text:style-name="P21">Os modelos NLP devem possuir versionamento.</text:p>
      <text:p text:style-name="P21">Exemplo:</text:p>
      <text:section text:style-name="Sect1" text:name="Seção33">
        <text:p text:style-name="P22"><text:bookmark text:name="code-block-viewer Copia 35"/><text:soft-page-break/><text:span text:style-name="Source_20_Text">all-MiniLM-L6-v2</text:span></text:p>
        <text:p text:style-name="P23"><text:span text:style-name="Source_20_Text">all-MiniLM-L12-v2</text:span></text:p>
      </text:section>
      <text:p text:style-name="P18"/>
      <text:p text:style-name="P17">RNF07 - Latência de processamento</text:p>
      <text:p text:style-name="Text_20_body"><text:span text:style-name="T14">Tempo máximo desejado: </text:span><text:bookmark text:name="code-block-viewer Copia 36"/><text:span text:style-name="Source_20_Text">&lt; 30 minutos para processamento diário.</text:span></text:p>
      <text:h text:style-name="P24" text:outline-level="2"><text:span text:style-name="Source_20_Text"><text:span text:style-name="T15">RNF0</text:span></text:span><text:span text:style-name="Source_20_Text"><text:span text:style-name="T16">8</text:span></text:span><text:span text:style-name="Source_20_Text"><text:span text:style-name="T15"> - Segurança</text:span></text:span></text:h>
      <text:p text:style-name="P13">Credenciais devem ser armazenadas em variáveis de ambiente .</text:p>
      <text:p text:style-name="P13">RNF<text:span text:style-name="T13">09</text:span> – Observabilidade</text:p>
      <text:p text:style-name="P13">Monitoramento de pipeline ,API , MLflow , Superset</text:p>
      <text:h text:style-name="P24" text:outline-level="2"><text:span text:style-name="T15">RNF</text:span><text:span text:style-name="T16">10</text:span><text:span text:style-name="T15"> – Portabilidade:</text:span> </text:h>
      <text:p text:style-name="P13">O sistema deve ser executável via containers Docker.</text:p>
      <text:h text:style-name="P25" text:outline-level="2">RNF12 - Armazenamento em Data Lake</text:h>
      <text:p text:style-name="P13">O sistema deve utilizar armazenamento compatível com S3.</text:p>
      <text:p text:style-name="Text_20_body">Exemplo:</text:p>
      <text:list text:style-name="L1">
        <text:list-item>
          <text:p text:style-name="P26">MinIO </text:p>
        </text:list-item>
        <text:list-item>
          <text:p text:style-name="P27">AWS S3 </text:p>
        </text:list-item>
      </text:list>
      <text:p text:style-name="P13"/>
      <text:h text:style-name="P24" text:outline-level="2">RNF13 - Formato aberto</text:h>
      <text:p text:style-name="Text_20_body">Os dados devem ser armazenados em <text:span text:style-name="T13">parquet</text:span></text:p>
      <text:p text:style-name="Text_20_body"/>
      <text:h text:style-name="P28" text:outline-level="2">RNF14 - Governança de Dados</text:h>
      <text:p text:style-name="Text_20_body">Metadados devem ser registrados para origem , data de coleta, versão do pipeline</text:p>
      <text:p text:style-name="Text_20_body"/>
      <text:p text:style-name="P13"/>
      <text:p text:style-name="P13"/>
      <text:p text:style-name="P13"/>
      <text:list text:style-name="L2">
        <text:list-header>
          <text:p text:style-name="P29"/>
        </text:list-header>
      </text:list>
      <text:p text:style-name="Text_20_body"><text:span text:style-name="Source_20_Text"/></text:p>
      <text:p text:style-name="Text_20_body"><text:span text:style-name="Source_20_Text"/></text:p>
      <text:p text:style-name="P21"/>
      <text:p text:style-name="P18"/>
      <text:p text:style-name="P20"><text:soft-page-break/></text:p>
      <text:p text:style-name="P11"/>
      <text:p text:style-name="P6"/>
      <text:p text:style-name="P5">3.<text:span text:style-name="T11">2 –</text:span> <text:span text:style-name="T11">C</text:span>oleta</text:p>
      <text:p text:style-name="P5"/>
      <text:p text:style-name="P30">3.3 – Amarzenamento </text:p>
      <text:p text:style-name="P30">3.3.1 – Camada Bronze</text:p>
      <text:p text:style-name="P30">A camada bronze irá receber os dados brutos, sem tratamento nenhum. A figura abaixo mostra a extrutura da camanda bronze.</text:p>
      <text:p text:style-name="P30"/>
      <text:p text:style-name="P30">bronze/ano=2025/mes=1/dia=14/id_canal={id_canal}/id_video={id_video}/comentarios.json</text:p>
      <text:p text:style-name="P30"/>
      <text:p text:style-name="P30">3.3.2 – Camada Prata</text:p>
      <text:p text:style-name="P30">A camada prata irá receber os comentários já processsados para treinamento do modelo e irá ser armazendado em formato parquet.</text:p>
      <text:p text:style-name="P30"/>
      <text:p text:style-name="P30">prata/ano=2025/mes=1/dia=14/id_canal={id_canal}/id_video={id_video}/comentarios_tratados.parquet</text:p>
      <text:p text:style-name="P30"/>
      <text:p text:style-name="P30">Extrutura do json:</text:p>
      <text:p text:style-name="P31">{</text:p>
      <text:p text:style-name="P31"><text:s text:c="2"/>"comment_id": "...",</text:p>
      <text:p text:style-name="P31"><text:s text:c="2"/>"text_clean": "...",</text:p>
      <text:p text:style-name="P31"><text:s text:c="2"/>"lemmas": [...],</text:p>
      <text:p text:style-name="P31"><text:s text:c="2"/>"language": "pt"</text:p>
      <text:p text:style-name="P31">}</text:p>
      <text:p text:style-name="P31"/>
      <text:p text:style-name="P30">3.3.3 – Camada <text:s/>Ouro</text:p>
      <text:p text:style-name="P30"/>
      <text:p text:style-name="P30">A camada outo irá armazenar os embedins e as palavras chaves para cada comentário.</text:p>
      <text:p text:style-name="P30"/>
      <text:p text:style-name="P30">ouro/ano=2025/mes=1/dia=14/id_canal={id_canal}/id_video={id_video}/embedding_model={“nome_do_embedding”}/embedings_tratados.parquet</text:p>
      <text:p text:style-name="P30"/>
      <text:p text:style-name="P30">{</text:p>
      <text:p text:style-name="P30"><text:s text:c="2"/>"comment_id": "...",</text:p>
      <text:p text:style-name="P30"><text:s text:c="2"/>"embedding": [...]</text:p>
      <text:p text:style-name="P30">}</text:p>
      <text:p text:style-name="P30"/>
      <text:p text:style-name="P30">ano=2025/mes=1/dia=14/id_canal={id_canal}/id_video={id_video}/palavra_chaves/embedings_tratados.parquet</text:p>
      <text:p text:style-name="P30"/>
      <text:p text:style-name="P30">{</text:p>
      <text:p text:style-name="P30"><text:s text:c="2"/>"comment_id": "...",</text:p>
      <text:p text:style-name="P30"><text:s text:c="2"/>"keywords": [</text:p>
      <text:p text:style-name="P30"><text:s text:c="4"/>"kafka",</text:p>
      <text:p text:style-name="P30"><text:s text:c="4"/>"streaming",</text:p>
      <text:p text:style-name="P30"><text:s text:c="4"/>"flink"</text:p>
      <text:p text:style-name="P30"><text:s text:c="2"/>]</text:p>
      <text:p text:style-name="P30">}</text:p>
      <text:p text:style-name="P30"/>
      <text:p text:style-name="P30">3.4- Camada ml</text:p>
      <text:p text:style-name="P30"><text:soft-page-break/></text:p>
      <text:p text:style-name="P32">3.4.1 Clustering: </text:p>
      <text:p text:style-name="P33"/>
      <text:p text:style-name="P33">Aqui irá ser gerado um snapshot diário de cada cluster, <text:span text:style-name="T17">procura responder em qual cluster o comentário foi criado</text:span>.</text:p>
      <text:p text:style-name="P31"/>
      <text:p text:style-name="P30">ml/ano=2025/mes=1/dia=14/id_canal={id_canal}/id_video={id_video}/palavra_chaves/embedings_tratados.parquet</text:p>
      <text:p text:style-name="P31"/>
      <text:p text:style-name="P31">{</text:p>
      <text:p text:style-name="P31"><text:s/>“<text:span text:style-name="T18">id_canal</text:span>”: “<text:span text:style-name="T18">id_canal</text:span>”</text:p>
      <text:p text:style-name="P34"><text:s text:c="2"/>"video_id": "v001",</text:p>
      <text:p text:style-name="P31"><text:s text:c="2"/>"comment_id": "c001",</text:p>
      <text:p text:style-name="P31"><text:s text:c="2"/>"cluster_id": 3,</text:p>
      <text:p text:style-name="P31"><text:s text:c="2"/>"cluster_probability": 0.91,</text:p>
      <text:p text:style-name="P31"><text:s text:c="2"/>"is_noise": false,</text:p>
      <text:p text:style-name="P31"><text:s text:c="2"/>"processing_date": "2026-05-31"</text:p>
      <text:p text:style-name="P31">}</text:p>
      <text:p text:style-name="P31"/>
      <text:p text:style-name="P35">ml/clustering/processing_date={data_atual}/</text:p>
      <text:p text:style-name="P35"/>
      <text:h text:style-name="P36" text:outline-level="2">Uso</text:h>
      <text:p text:style-name="P37">Permite:</text:p>
      <text:list text:style-name="L3">
        <text:list-item>
          <text:p text:style-name="P38">analisar comentários por cluster; </text:p>
        </text:list-item>
        <text:list-item>
          <text:p text:style-name="P38">filtrar comentários de um grupo específico; </text:p>
        </text:list-item>
        <text:list-item>
          <text:p text:style-name="P39">investigar erros de classificação. </text:p>
        </text:list-item>
      </text:list>
      <text:p text:style-name="P35"/>
      <text:p text:style-name="P30"/>
      <text:p text:style-name="P30"/>
      <text:p text:style-name="P40"><text:span text:style-name="T19">3.4.2 – </text:span>clustering profiles</text:p>
      <text:p text:style-name="P5"/>
      <text:p text:style-name="P35">É responsável por guardar o perfil agregado de cada cluster. <text:span text:style-name="T17">Apresenta como objetivo responder q</text:span>uem é este cluster</text:p>
      <text:p text:style-name="P35">ml/clustering_profiles/</text:p>
      <text:p text:style-name="P5"/>
      <text:p text:style-name="P5">{</text:p>
      <text:p text:style-name="P5"><text:s text:c="2"/>"cluster_id": 3,</text:p>
      <text:p text:style-name="P5"><text:s text:c="2"/>"processing_date": "2026-05-31",</text:p>
      <text:p text:style-name="P5"><text:s text:c="2"/>"size": 245,</text:p>
      <text:p text:style-name="P5"><text:s text:c="2"/>"avg_likes": 18.4,</text:p>
      <text:p text:style-name="P5"><text:s text:c="2"/>"top_keywords": [</text:p>
      <text:p text:style-name="P5"><text:s text:c="4"/>"kafka",</text:p>
      <text:p text:style-name="P5"><text:s text:c="4"/>"broker",</text:p>
      <text:p text:style-name="P5"><text:s text:c="4"/>"stream"</text:p>
      <text:p text:style-name="P5"><text:s text:c="2"/>],</text:p>
      <text:p text:style-name="P5"><text:s text:c="2"/>"top_entities": [</text:p>
      <text:p text:style-name="P5"><text:s text:c="4"/>"Kafka",</text:p>
      <text:p text:style-name="P5"><text:s text:c="4"/>"Docker"</text:p>
      <text:p text:style-name="P5"><text:s text:c="2"/>]</text:p>
      <text:p text:style-name="P5"><text:soft-page-break/>}</text:p>
      <text:p text:style-name="P5"/>
      <text:p text:style-name="P35">uso dashboard: </text:p>
      <text:p text:style-name="P5">Cluster 3</text:p>
      <text:p text:style-name="P5"/>
      <text:p text:style-name="P5">245 comentários</text:p>
      <text:p text:style-name="P5"/>
      <text:p text:style-name="P5">Principais termos:</text:p>
      <text:p text:style-name="P5">- kafka</text:p>
      <text:p text:style-name="P5">- broker</text:p>
      <text:p text:style-name="P5">- stream</text:p>
      <text:p text:style-name="P5"/>
      <text:p text:style-name="P5">Principais entidades:</text:p>
      <text:p text:style-name="P5">- Kafka</text:p>
      <text:p text:style-name="P5">- Docker</text:p>
      <text:p text:style-name="P5"/>
      <text:p text:style-name="P5"/>
      <text:p text:style-name="P41">3.4.3 -Centroid <text:span text:style-name="T20">snapshots</text:span>:</text:p>
      <text:p text:style-name="P41"/>
      <text:p text:style-name="P35">Guara o vetor representativo do cluster. <text:span text:style-name="T17">Apresenta como objetivo reponder q</text:span>ual é o ceentro semantico do cluster.</text:p>
      <text:p text:style-name="P35"/>
      <text:p text:style-name="P35">{</text:p>
      <text:p text:style-name="P35"><text:s text:c="2"/>"date": "2026-05-31",</text:p>
      <text:p text:style-name="P35"><text:s text:c="2"/>"lineage_id": "A",</text:p>
      <text:p text:style-name="P35"><text:s text:c="2"/>"cluster_id": 3,</text:p>
      <text:p text:style-name="P35"><text:s text:c="2"/>"centroid_vector": [...]</text:p>
      <text:p text:style-name="P35">}</text:p>
      <text:p text:style-name="P35"/>
      <text:p text:style-name="P35"/>
      <text:p text:style-name="P42">3.4.4 – Centroid Drift:</text:p>
      <text:p text:style-name="P42"/>
      <text:p text:style-name="P43">Guarda a comparação entre snapshots.</text:p>
      <text:p text:style-name="P44">{</text:p>
      <text:p text:style-name="P44"><text:s text:c="2"/>"lineage_id": "A",</text:p>
      <text:p text:style-name="P44"><text:s text:c="2"/>"date": "2026-05-31",</text:p>
      <text:p text:style-name="P44"><text:s text:c="2"/>"previous_date": "2026-05-30",</text:p>
      <text:p text:style-name="P44"><text:s text:c="2"/>"similarity": 0.88,</text:p>
      <text:p text:style-name="P44"><text:s text:c="2"/>"drift_score": 0.12</text:p>
      <text:p text:style-name="P44">}</text:p>
      <text:p text:style-name="P44"/>
      <text:h text:style-name="P45" text:outline-level="1">Métricas derivadas</text:h>
      <text:p text:style-name="P46">Com isso você consegue medir:</text:p>
      <text:h text:style-name="P47" text:outline-level="3">Drift diário</text:h>
      <text:section text:style-name="Sect1" text:name="Seção35">
        <text:p text:style-name="P48"><text:bookmark text:name="code-block-viewer Copia 40"/><text:span text:style-name="Source_20_Text">A(t)</text:span></text:p>
        <text:p text:style-name="P49"><text:span text:style-name="Source_20_Text">vs</text:span></text:p>
        <text:p text:style-name="P50"><text:span text:style-name="Source_20_Text">A(t-1)</text:span></text:p>
      </text:section>
      <text:p text:style-name="P51"/>
      <text:h text:style-name="P47" text:outline-level="3"><text:soft-page-break/>Drift semanal</text:h>
      <text:section text:style-name="Sect1" text:name="Seção36">
        <text:p text:style-name="P48"><text:bookmark text:name="code-block-viewer Copia 41"/><text:span text:style-name="Source_20_Text">A(t)</text:span></text:p>
        <text:p text:style-name="P49"><text:span text:style-name="Source_20_Text">vs</text:span></text:p>
        <text:p text:style-name="P50"><text:span text:style-name="Source_20_Text">A(t-7)</text:span></text:p>
      </text:section>
      <text:p text:style-name="P51"/>
      <text:h text:style-name="P47" text:outline-level="3">Drift mensal</text:h>
      <text:section text:style-name="Sect1" text:name="Seção37">
        <text:p text:style-name="P48"><text:bookmark text:name="code-block-viewer Copia 42"/><text:span text:style-name="Source_20_Text">A(t)</text:span></text:p>
        <text:p text:style-name="P49"><text:span text:style-name="Source_20_Text">vs</text:span></text:p>
        <text:p text:style-name="P50"><text:span text:style-name="Source_20_Text">A(t-30)</text:span></text:p>
      </text:section>
      <text:p text:style-name="P51"/>
      <text:h text:style-name="P47" text:outline-level="3">Velocidade de mudança</text:h>
      <text:section text:style-name="Sect1" text:name="Seção38">
        <text:p text:style-name="P48"><text:bookmark text:name="code-block-viewer Copia 43"/><text:span text:style-name="Source_20_Text">velocity =</text:span></text:p>
        <text:p text:style-name="P50"><text:span text:style-name="Source_20_Text">drift_score / dias</text:span></text:p>
      </text:section>
      <text:p text:style-name="P46">Exemplo:</text:p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Table_20_Heading">Comunidade</text:p>
            </table:table-cell>
            <table:table-cell table:style-name="Tabela9.A1" office:value-type="string">
              <text:p text:style-name="Table_20_Heading">Velocidade</text:p>
            </table:table-cell>
          </table:table-row>
        </table:table-header-rows>
        <table:table-row>
          <table:table-cell table:style-name="Tabela9.A1" office:value-type="string">
            <text:p text:style-name="Table_20_Contents">Kafka</text:p>
          </table:table-cell>
          <table:table-cell table:style-name="Tabela9.A1" office:value-type="string">
            <text:p text:style-name="Table_20_Contents">0.02</text:p>
          </table:table-cell>
        </table:table-row>
        <table:table-row>
          <table:table-cell table:style-name="Tabela9.A1" office:value-type="string">
            <text:p text:style-name="Table_20_Contents">Docker</text:p>
          </table:table-cell>
          <table:table-cell table:style-name="Tabela9.A1" office:value-type="string">
            <text:p text:style-name="Table_20_Contents">0.31</text:p>
          </table:table-cell>
        </table:table-row>
      </table:table>
      <text:p text:style-name="P46">A comunidade Docker está mudando muito mais rapidamente.</text:p>
      <text:p text:style-name="P44"/>
      <text:p text:style-name="P35"/>
      <text:p text:style-name="P41">3.4.<text:span text:style-name="T20">5</text:span> – Lineage: </text:p>
      <text:p text:style-name="P35">É a tabela de rastreamento temporal. Possui o objetivo de mostrar a origem do cluster.</text:p>
      <text:p text:style-name="P35"/>
      <text:p text:style-name="P35">{</text:p>
      <text:p text:style-name="P35"><text:s text:c="2"/>"processing_date": "2026-05-31",</text:p>
      <text:p text:style-name="P35"><text:s text:c="2"/>"cluster_today": 7,</text:p>
      <text:p text:style-name="P35"><text:s text:c="2"/>"cluster_yesterday": 3,</text:p>
      <text:p text:style-name="P35"><text:s text:c="2"/>"similarity": 0.89</text:p>
      <text:p text:style-name="P35">}</text:p>
      <text:p text:style-name="P35"/>
      <text:p text:style-name="P35">Interpretação:</text:p>
      <text:p text:style-name="P35">Dia 30</text:p>
      <text:p text:style-name="P35"/>
      <text:p text:style-name="P35">Cluster 3</text:p>
      <text:p text:style-name="P35"/>
      <text:p text:style-name="P35">↓</text:p>
      <text:p text:style-name="P35"/>
      <text:p text:style-name="P35">Dia 31</text:p>
      <text:p text:style-name="P35"/>
      <text:p text:style-name="P35">Cluster 7</text:p>
      <text:p text:style-name="P35"/>
      <text:p text:style-name="P35">Similaridade = 89%</text:p>
      <text:p text:style-name="P35">estrutura: ml/lineage/</text:p>
      <text:h text:style-name="P36" text:outline-level="2"><text:soft-page-break/></text:h>
      <text:p text:style-name="P52"/>
      <text:p text:style-name="P53"/>
      <text:p text:style-name="P54">3.4.<text:span text:style-name="T20">6</text:span> – Lineage events:</text:p>
      <text:p text:style-name="P54">Guarda os eventos de evolução, apresenta o objeto de responder o que aconteceu com os clusters. Permite criar gráficos de evolução</text:p>
      <text:p text:style-name="P52">NEW_CLUSTER</text:p>
      <text:p text:style-name="P52">DEAD_CLUSTER</text:p>
      <text:p text:style-name="P52">SPLIT_CLUSTER</text:p>
      <text:p text:style-name="P52">MERGE_CLUSTER</text:p>
      <text:p text:style-name="P52">STABLE_CLUSTER</text:p>
      <text:p text:style-name="P54">Exemplo new cluster</text:p>
      <text:p text:style-name="Text_20_body">{ "event_type": "NEW_CLUSTER", "cluster_id": 9 }</text:p>
      <text:p text:style-name="P54">Exemplo Split</text:p>
      <text:p text:style-name="Text_20_body">{ "event_type": "SPLIT_CLUSTER", "parent_cluster": 3, "children": [7,8] }</text:p>
      <text:p text:style-name="P54">exemplo Merge:</text:p>
      <text:p text:style-name="Text_20_body">{ "event_type": "MERGE_CLUSTER", "parents": [4,5], "child": 10 }</text:p>
      <text:p text:style-name="P55">estrutura: ml/<text:span text:style-name="T21">lineage_events</text:span>/</text:p>
      <text:h text:style-name="P56" text:outline-level="2">Uso</text:h>
      <text:p text:style-name="P37">Permite criar gráficos de evolução.</text:p>
      <text:p text:style-name="P55"/>
      <text:p text:style-name="P55"/>
      <text:p text:style-name="P55"/>
      <text:p text:style-name="P55"/>
      <text:p text:style-name="P57">3.4.<text:span text:style-name="T20">7</text:span> -Drift</text:p>
      <text:p text:style-name="P57"/>
      <text:p text:style-name="P57">É responsavel por guardar métricas de mudanças dos clusters. Apresenta como objetivo responder quando o cluster apresentou mudança.</text:p>
      <text:p text:style-name="P57"/>
      <text:p text:style-name="P57">{</text:p>
      <text:p text:style-name="P57"><text:s text:c="2"/>"processing_date": "2026-05-31",</text:p>
      <text:p text:style-name="P57"><text:s text:c="2"/>"cluster_id": 3,</text:p>
      <text:p text:style-name="P57"><text:s text:c="2"/>"similarity": 0.81,</text:p>
      <text:p text:style-name="P57"><text:s text:c="2"/>"drift_score": 0.19</text:p>
      <text:p text:style-name="P57">}</text:p>
      <text:p text:style-name="Text_20_body"/>
      <text:p text:style-name="Text_20_body">drift_score =1 - similarity</text:p>
      <text:p text:style-name="P54">Interpretação </text:p>
      <table:table table:name="Tabela8" table:style-name="Tabela8">
        <table:table-column table:style-name="Tabela8.A"/>
        <table:table-column table:style-name="Tabela8.B"/>
        <table:table-header-rows>
          <text:soft-page-break/>
          <table:table-row>
            <table:table-cell table:style-name="Tabela8.A1" office:value-type="string">
              <text:p text:style-name="Table_20_Heading">Similaridade</text:p>
            </table:table-cell>
            <table:table-cell table:style-name="Tabela8.A1" office:value-type="string">
              <text:p text:style-name="Table_20_Heading">Drift</text:p>
            </table:table-cell>
          </table:table-row>
        </table:table-header-rows>
        <table:table-row>
          <table:table-cell table:style-name="Tabela8.A1" office:value-type="string">
            <text:p text:style-name="Table_20_Contents">0.95</text:p>
          </table:table-cell>
          <table:table-cell table:style-name="Tabela8.A1" office:value-type="string">
            <text:p text:style-name="Table_20_Contents">0.05</text:p>
          </table:table-cell>
        </table:table-row>
        <table:table-row>
          <table:table-cell table:style-name="Tabela8.A1" office:value-type="string">
            <text:p text:style-name="Table_20_Contents">0.80</text:p>
          </table:table-cell>
          <table:table-cell table:style-name="Tabela8.A1" office:value-type="string">
            <text:p text:style-name="Table_20_Contents">0.20</text:p>
          </table:table-cell>
        </table:table-row>
        <table:table-row>
          <table:table-cell table:style-name="Tabela8.A1" office:value-type="string">
            <text:p text:style-name="Table_20_Contents">0.60</text:p>
          </table:table-cell>
          <table:table-cell table:style-name="Tabela8.A1" office:value-type="string">
            <text:p text:style-name="Table_20_Contents">0.40</text:p>
          </table:table-cell>
        </table:table-row>
      </table:table>
      <text:p text:style-name="P55"/>
      <text:p text:style-name="P55">estrutura: ml/<text:span text:style-name="T21">drift</text:span>/</text:p>
      <text:p text:style-name="P55"/>
      <text:p text:style-name="P52"/>
      <text:p text:style-name="P52"/>
      <text:p text:style-name="P52"/>
      <text:p text:style-name="P54">3.4.<text:span text:style-name="T20">8 </text:span>– Audience Metrics</text:p>
      <text:p text:style-name="P54"/>
      <text:p text:style-name="P54">Representa a métricas globais de audiência. Apresenta como objetivo como responder como a audiência está evoluindo.</text:p>
      <text:p text:style-name="P55">estrutura: ml/<text:span text:style-name="T21">audicence_metrics</text:span>/</text:p>
      <text:p text:style-name="P55"/>
      <text:p text:style-name="P54">Ex:</text:p>
      <text:p text:style-name="P54">{</text:p>
      <text:p text:style-name="P54"><text:s text:c="2"/>"date": "2026-05-31",</text:p>
      <text:p text:style-name="P54"><text:s text:c="2"/>"total_comments": 12450,</text:p>
      <text:p text:style-name="P54"><text:s text:c="2"/>"num_clusters": 8,</text:p>
      <text:p text:style-name="P54"><text:s text:c="2"/>"new_clusters": 2,</text:p>
      <text:p text:style-name="P54"><text:s text:c="2"/>"dead_clusters": 1,</text:p>
      <text:p text:style-name="P54"><text:s text:c="2"/>"global_drift": 0.14,</text:p>
      <text:p text:style-name="P54"><text:s text:c="2"/>"asi": 0.86</text:p>
      <text:p text:style-name="P54">}</text:p>
      <text:p text:style-name="P52"/>
      <text:h text:style-name="P36" text:outline-level="2">Métricas</text:h>
      <text:h text:style-name="P58" text:outline-level="3">total_comments</text:h>
      <text:p text:style-name="P37">Volume total.</text:p>
      <text:p text:style-name="P59"/>
      <text:h text:style-name="P58" text:outline-level="3">num_clusters</text:h>
      <text:p text:style-name="P37">Quantidade de comunidades.</text:p>
      <text:p text:style-name="P59"/>
      <text:h text:style-name="P58" text:outline-level="3"><text:soft-page-break/>global_drift</text:h>
      <text:p text:style-name="P37">Mudança média da audiência.</text:p>
      <text:p text:style-name="P59"/>
      <text:h text:style-name="P58" text:outline-level="3">ASI</text:h>
      <text:p text:style-name="P37">Audience Stability Index. <text:bookmark text:name="code-block-viewer Copia 37"/><text:span text:style-name="Source_20_Text">ASI =</text:span></text:p>
      <text:section text:style-name="Sect1" text:name="Seção34">
        <text:p text:style-name="P60"><text:span text:style-name="Source_20_Text">mean(similarities)</text:span></text:p>
      </text:section>
      <text:p text:style-name="P37">1.0 -&gt; muito estável</text:p>
      <text:p text:style-name="P37">0.0 -&gt; totalmente diferente</text:p>
      <text:p text:style-name="P52"/>
      <text:p text:style-name="P52"/>
      <text:p text:style-name="P54">3.4.<text:span text:style-name="T20">9</text:span>- Cluster history.</text:p>
      <text:p text:style-name="P54">Apresenta como objeto responder o histórico consolidado dos clusters. Procura responder como esse cluster evoluiu ao longo do tempo.</text:p>
      <text:p text:style-name="P54">Exemplo:</text:p>
      <text:p text:style-name="Text_20_body">{ "cluster_lineage_id": "A", "date": "2026-05-31", "cluster_id": 3, "size": 245, "avg_sentiment": 0.82 }</text:p>
      <text:p text:style-name="Text_20_body"/>
      <text:p text:style-name="Text_20_body">Cluster A</text:p>
      <text:p text:style-name="Text_20_body"/>
      <text:p text:style-name="Text_20_body">01/05 -&gt; 120 comentários</text:p>
      <text:p text:style-name="Text_20_body">05/05 -&gt; 180 comentários</text:p>
      <text:p text:style-name="Text_20_body">10/05 -&gt; 260 comentários</text:p>
      <text:p text:style-name="Text_20_body">15/05 -&gt; 390 comentários</text:p>
      <text:p text:style-name="P52"/>
      <text:h text:style-name="P36" text:outline-level="2">Uso</text:h>
      <text:p text:style-name="P37">Gera gráficos:</text:p>
      <text:list text:style-name="L4">
        <text:list-item>
          <text:p text:style-name="P61">crescimento </text:p>
        </text:list-item>
        <text:list-item>
          <text:p text:style-name="P61">queda </text:p>
        </text:list-item>
        <text:list-item>
          <text:p text:style-name="P62">estabilidade</text:p>
        </text:list-item>
      </text:list>
      <text:p text:style-name="P55">estrutura: ml/<text:span text:style-name="T21">cluster_history</text:span>/</text:p>
      <text:p text:style-name="P55"/>
      <text:p text:style-name="P57">3.4.9 – Monitory</text:p>
      <text:p text:style-name="P57">Integração com tracking do pipeline. Tem como objetivo responder como o modelo foi executado.</text:p>
      <text:p text:style-name="P57"/>
      <text:p text:style-name="P57">Exemplo:</text:p>
      <text:p text:style-name="P57"><text:soft-page-break/>{</text:p>
      <text:p text:style-name="P57"><text:s text:c="2"/>"run_id": "abc123",</text:p>
      <text:p text:style-name="P57"><text:s text:c="2"/>"embedding_model": "all-MiniLM-L6-v2",</text:p>
      <text:p text:style-name="P57"><text:s text:c="2"/>"clustering_algorithm": "HDBSCAN",</text:p>
      <text:p text:style-name="P57"><text:s text:c="2"/>"num_clusters": 8,</text:p>
      <text:p text:style-name="P57"><text:s text:c="2"/>"noise_ratio": 0.12,</text:p>
      <text:p text:style-name="P57"><text:s text:c="2"/>"processing_time": 452</text:p>
      <text:p text:style-name="P57">}</text:p>
      <text:p text:style-name="P55">estrutura: ml/<text:span text:style-name="T21">monitory</text:span>/</text:p>
      <text:p text:style-name="P52"/>
      <text:p text:style-name="P52"/>
      <text:p text:style-name="P52"/>
      <text:p text:style-name="P52"/>
      <text:p text:style-name="P52"/>
      <text:p text:style-name="P52"/>
      <text:p text:style-name="P35"/>
      <text:p text:style-name="P35"/>
      <text:p text:style-name="P5"/>
      <text:p text:style-name="P5">-------------------------------</text:p>
      <text:p text:style-name="P5"/>
      <text:p text:style-name="P5">3.<text:span text:style-name="T11">3</text:span> – Amarzenamento</text:p>
      <text:p text:style-name="P5">- <text:span text:style-name="T11">bronze</text:span></text:p>
      <text:p text:style-name="P5">-- <text:span text:style-name="T11">youtube_coments</text:span></text:p>
      <text:p text:style-name="P63"><text:span text:style-name="T22">--- </text:span>ingestion_date=YYYY-MM-DD/</text:p>
      <text:p text:style-name="P63">--- <text:span text:style-name="T11">v</text:span>ideo_id=VIDEO_ID/</text:p>
      <text:p text:style-name="P5"/>
      <text:p text:style-name="P5">- <text:span text:style-name="T11">silver</text:span></text:p>
      <text:p text:style-name="P5">-- <text:span text:style-name="T11">commennts_nlp</text:span></text:p>
      <text:p text:style-name="P63"><text:span text:style-name="T22">--- </text:span>processing_date=YYYY-MM-DD/</text:p>
      <text:p text:style-name="P63">{</text:p>
      <text:p text:style-name="P63"><text:s text:c="2"/>"comment_id": "...",</text:p>
      <text:p text:style-name="P63"><text:s text:c="2"/>"text_clean": "...",</text:p>
      <text:p text:style-name="P63"><text:s text:c="2"/>"lemmas": [...],</text:p>
      <text:p text:style-name="P63"><text:s text:c="2"/>"language": "pt"</text:p>
      <text:p text:style-name="P63">}</text:p>
      <text:p text:style-name="P5"/>
      <text:p text:style-name="P5">- <text:span text:style-name="T11">gold</text:span></text:p>
      <text:p text:style-name="P5">-- <text:span text:style-name="T11">embeddings</text:span></text:p>
      <text:p text:style-name="P63"><text:span text:style-name="T22">--- </text:span>embedding_model=all-MiniLM-L6-v2/</text:p>
      <text:p text:style-name="P63">---- processing_date=YYYY-MM-DD/</text:p>
      <text:p text:style-name="P63"/>
      <text:p text:style-name="P63">{</text:p>
      <text:p text:style-name="P63"><text:s text:c="2"/>"comment_id": "...",</text:p>
      <text:p text:style-name="P63"><text:s text:c="2"/>"embedding": [...]</text:p>
      <text:p text:style-name="P63">}</text:p>
      <text:p text:style-name="P63"/>
      <text:p text:style-name="P5">-- <text:span text:style-name="T11">keywords</text:span></text:p>
      <text:p text:style-name="P5">{</text:p>
      <text:p text:style-name="P5"><text:soft-page-break/><text:s text:c="2"/>"comment_id": "...",</text:p>
      <text:p text:style-name="P5"><text:s text:c="2"/>"keywords": [</text:p>
      <text:p text:style-name="P5"><text:s text:c="4"/>"kafka",</text:p>
      <text:p text:style-name="P5"><text:s text:c="4"/>"streaming",</text:p>
      <text:p text:style-name="P5"><text:s text:c="4"/>"flink"</text:p>
      <text:p text:style-name="P5"><text:s text:c="2"/>]</text:p>
      <text:p text:style-name="P5">}</text:p>
      <text:p text:style-name="P5"/>
      <text:p text:style-name="P5">- <text:span text:style-name="T11">modelos</text:span></text:p>
      <text:p text:style-name="P63"><text:span text:style-name="T22">-- </text:span>clustering</text:p>
      <text:p text:style-name="P63">---date=YYYY-MM-DD/</text:p>
      <text:p text:style-name="P63">{</text:p>
      <text:p text:style-name="P63"><text:s text:c="2"/>"comment_id": "...",</text:p>
      <text:p text:style-name="P63"><text:s text:c="2"/>"cluster_id": 3,</text:p>
      <text:p text:style-name="P63"><text:s text:c="2"/>"cluster_probability": 0.91,</text:p>
      <text:p text:style-name="P63"><text:s text:c="2"/>"is_noise": false</text:p>
      <text:p text:style-name="P63">}</text:p>
      <text:p text:style-name="P63"/>
      <text:p text:style-name="P63">-- clustering_profiles</text:p>
      <text:p text:style-name="P63">--- <text:span text:style-name="T11">d</text:span>ate=YYYY-MM-DD/</text:p>
      <text:p text:style-name="P63">{</text:p>
      <text:p text:style-name="P63"><text:s text:c="2"/>"cluster_id": 3,</text:p>
      <text:p text:style-name="P63"><text:s text:c="2"/>"size": 241,</text:p>
      <text:p text:style-name="P63"><text:s text:c="2"/>"avg_likes": 12,</text:p>
      <text:p text:style-name="P63"><text:s text:c="2"/>"top_keywords": [</text:p>
      <text:p text:style-name="P63"><text:s text:c="4"/>"kafka",</text:p>
      <text:p text:style-name="P63"><text:s text:c="4"/>"broker",</text:p>
      <text:p text:style-name="P63"><text:s text:c="4"/>"stream"</text:p>
      <text:p text:style-name="P63"><text:s text:c="2"/>]</text:p>
      <text:p text:style-name="P63">}</text:p>
      <text:p text:style-name="P63">-- centroids</text:p>
      <text:p text:style-name="P63">---date=YYYY-MM-DD/</text:p>
      <text:p text:style-name="P63">{</text:p>
      <text:p text:style-name="P63"><text:s text:c="2"/>"cluster_id": 3,</text:p>
      <text:p text:style-name="P63"><text:s text:c="2"/>"centroid_vector": [...]</text:p>
      <text:p text:style-name="P63">}</text:p>
      <text:p text:style-name="P63"/>
      <text:p text:style-name="P63"/>
      <text:p text:style-name="P63">-- lineage</text:p>
      <text:p text:style-name="P63">{</text:p>
      <text:p text:style-name="P63"><text:s text:c="2"/>"date": "2026-05-28",</text:p>
      <text:p text:style-name="P63"><text:s text:c="2"/>"cluster_today": 7,</text:p>
      <text:p text:style-name="P63"><text:s text:c="2"/>"cluster_previous": 3,</text:p>
      <text:p text:style-name="P63"><text:s text:c="2"/>"similarity": 0.91</text:p>
      <text:p text:style-name="P63">}</text:p>
      <text:p text:style-name="P63"/>
      <text:p text:style-name="P63"/>
      <text:p text:style-name="P64">-- lineage_events</text:p>
      <text:p text:style-name="Text_20_body">{ "event_date": "2026-05-28", "event_type": "NEW_CLUSTER", "cluster_id": 8 }</text:p>
      <text:p text:style-name="Text_20_body">{ "event_type": "SPLIT_CLUSTER", "parent_cluster": 2, "children": [5,6] }</text:p>
      <text:p text:style-name="Text_20_body"><text:soft-page-break/></text:p>
      <text:p text:style-name="Text_20_body">NEW_CLUSTER</text:p>
      <text:p text:style-name="Text_20_body">DEAD_CLUSTER</text:p>
      <text:p text:style-name="Text_20_body">SPLIT_CLUSTER</text:p>
      <text:p text:style-name="Text_20_body">MERGE_CLUSTER</text:p>
      <text:p text:style-name="Text_20_body">STABLE_CLUSTER</text:p>
      <text:p text:style-name="Text_20_body">{ "event_type": "MERGE_CLUSTER", "parents": [4,7], "child": 9 }</text:p>
      <text:p text:style-name="Text_20_body"/>
      <text:p text:style-name="Text_20_body"/>
      <text:p text:style-name="P63">-- drift</text:p>
      <text:p text:style-name="P63">--- date=YYYY-MM-DD/</text:p>
      <text:p text:style-name="P63">{</text:p>
      <text:p text:style-name="P63"><text:s text:c="2"/>"cluster_id": 3,</text:p>
      <text:p text:style-name="P63"><text:s text:c="2"/>"similarity": 0.84,</text:p>
      <text:p text:style-name="P63"><text:s text:c="2"/>"drift_score": 0.16</text:p>
      <text:p text:style-name="P63">}</text:p>
      <text:p text:style-name="P63">-- audience_metrics</text:p>
      <text:p text:style-name="P63">{</text:p>
      <text:p text:style-name="P63"><text:s text:c="2"/>"date": "2026-05-28",</text:p>
      <text:p text:style-name="P63"><text:s text:c="2"/>"total_comments": 12450,</text:p>
      <text:p text:style-name="P63"><text:s text:c="2"/>"num_clusters": 9,</text:p>
      <text:p text:style-name="P63"><text:s text:c="2"/>"new_clusters": 2,</text:p>
      <text:p text:style-name="P63"><text:s text:c="2"/>"dead_clusters": 1,</text:p>
      <text:p text:style-name="P63"><text:s text:c="2"/>"avg_similarity": 0.88,</text:p>
      <text:p text:style-name="P63"><text:s text:c="2"/>"global_drift": 0.12,</text:p>
      <text:p text:style-name="P63"><text:s text:c="2"/>"asi": 0.88</text:p>
      <text:p text:style-name="P63">}</text:p>
      <text:p text:style-name="P64">-- cluster_history</text:p>
      <text:p text:style-name="Text_20_body"><text:s text:c="4"/>{ "cluster_lineage_id": "A", "date": "2026-05-28", "cluster_id": 3, "size": 240, "similarity": 0.91 }</text:p>
      <text:p text:style-name="Text_20_body"/>
      <text:p text:style-name="P63">-- monitoring</text:p>
      <text:p text:style-name="P63">{</text:p>
      <text:p text:style-name="P63"><text:s text:c="2"/>"run_id": "...",</text:p>
      <text:p text:style-name="P63"><text:s text:c="2"/>"model": "all-MiniLM-L6-v2",</text:p>
      <text:p text:style-name="P63"><text:s text:c="2"/>"cluster_algorithm": "HDBSCAN",</text:p>
      <text:p text:style-name="P63"><text:s text:c="2"/>"num_clusters": 8,</text:p>
      <text:p text:style-name="P63"><text:s text:c="2"/>"global_drift": 0.15</text:p>
      <text:p text:style-name="P63">}</text:p>
      <text:p text:style-name="P5"/>
      <text:p text:style-name="P5"/>
      <text:p text:style-name="P5">3.<text:span text:style-name="T11">4 </text:span>- Treinamento modelo</text:p>
      <text:p text:style-name="P5"/>
      <text:p text:style-name="P6">4- Gráficos do dashboard</text:p>
      <text:p text:style-name="P5"><text:soft-page-break/></text:p>
      <text:h text:style-name="P65" text:outline-level="1">11. Dashboard (Superset)</text:h>
      <text:p text:style-name="P66">Apache Superset</text:p>
      <text:p text:style-name="P66">Visualizações:</text:p>
      <text:list text:style-name="L5">
        <text:list-item>
          <text:p text:style-name="P67">evolução de clusters no tempo </text:p>
        </text:list-item>
        <text:list-item>
          <text:p text:style-name="P67">heatmap de drift </text:p>
        </text:list-item>
        <text:list-item>
          <text:p text:style-name="P67">distribuição de audiência por vídeo </text:p>
        </text:list-item>
        <text:list-item>
          <text:p text:style-name="P67">clusters emergentes vs estáveis </text:p>
        </text:list-item>
        <text:list-item>
          <text:p text:style-name="P68">palavras-chave por cluster </text:p>
        </text:list-item>
      </text:list>
      <text:p text:style-name="P66"/>
      <text:h text:style-name="P69" text:outline-level="1">12. Camada de interpretação (spaCy)</text:h>
      <text:p text:style-name="P66">Use spaCy para:</text:p>
      <text:list text:style-name="L6">
        <text:list-item>
          <text:p text:style-name="P70">extração de entidades (NER) </text:p>
        </text:list-item>
        <text:list-item>
          <text:p text:style-name="P70">keywords por cluster </text:p>
        </text:list-item>
        <text:list-item>
          <text:p text:style-name="P71">padrões linguísticos </text:p>
        </text:list-item>
      </text:list>
      <text:p text:style-name="P66">Exemplo:</text:p>
      <text:list text:style-name="L7">
        <text:list-item>
          <text:p text:style-name="P72">Cluster 1: "tutorial", "aprendi", "explicação" </text:p>
        </text:list-item>
        <text:list-item>
          <text:p text:style-name="P73">Cluster 2: "não funciona", "erro", "bug" </text:p>
        </text:list-item>
      </text:list>
      <text:p text:style-name="P66"/>
      <text:h text:style-name="P65" text:outline-level="1">12. Camada de interpretação (spaCy)</text:h>
      <text:p text:style-name="P66">Use spaCy para:</text:p>
      <text:list text:style-name="L8">
        <text:list-item>
          <text:p text:style-name="P74">extração de entidades (NER) </text:p>
        </text:list-item>
        <text:list-item>
          <text:p text:style-name="P74">keywords por cluster </text:p>
        </text:list-item>
        <text:list-item>
          <text:p text:style-name="P75">padrões linguísticos </text:p>
        </text:list-item>
      </text:list>
      <text:p text:style-name="P66">Exemplo:</text:p>
      <text:list text:style-name="L9">
        <text:list-item>
          <text:p text:style-name="P76">Cluster 1: "tutorial", "aprendi", "explicação" </text:p>
        </text:list-item>
        <text:list-item>
          <text:p text:style-name="P77">Cluster 2: "não funciona", "erro", "bug" </text:p>
        </text:list-item>
      </text:list>
      <text:p text:style-name="P5"/>
      <text:p text:style-name="P5"/>
      <text:h text:style-name="P65" text:outline-level="1"><text:soft-page-break/>9. MLflow (parte importante)</text:h>
      <text:h text:style-name="P78" text:outline-level="2">O que rastrear</text:h>
      <text:h text:style-name="P79" text:outline-level="3">Experimentos:</text:h>
      <text:list text:style-name="L10">
        <text:list-item>
          <text:p text:style-name="P80">embedding model (spaCy vs BERT) </text:p>
        </text:list-item>
        <text:list-item>
          <text:p text:style-name="P80">algoritmo clustering </text:p>
        </text:list-item>
        <text:list-item>
          <text:p text:style-name="P80">parâmetros HDBSCAN </text:p>
        </text:list-item>
        <text:list-item>
          <text:p text:style-name="P81">métricas de estabilidade temporal </text:p>
        </text:list-item>
      </text:list>
      <text:p text:style-name="P82"/>
      <text:h text:style-name="P78" text:outline-level="2">Métricas</text:h>
      <text:list text:style-name="L11">
        <text:list-item>
          <text:p text:style-name="P83">número de clusters por dia </text:p>
        </text:list-item>
        <text:list-item>
          <text:p text:style-name="P83">% ruído </text:p>
        </text:list-item>
        <text:list-item>
          <text:p text:style-name="P83">estabilidade de clusters (cosine drift médio) </text:p>
        </text:list-item>
        <text:list-item>
          <text:p text:style-name="P84">silhouette score (opcional) </text:p>
        </text:list-item>
      </text:list>
      <text:p text:style-name="P5"/>
      <text:p text:style-name="P85">A <text:span text:style-name="Strong_20_Emphasis">detecção de drift de audiência</text:span> é provavelmente a métrica mais valiosa do projeto, porque ela responde perguntas como:</text:p>
      <text:list text:style-name="L12">
        <text:list-item>
          <text:p text:style-name="P86">"A audiência continua a mesma?" </text:p>
        </text:list-item>
        <text:list-item>
          <text:p text:style-name="P86">"Os temas discutidos mudaram?" </text:p>
        </text:list-item>
        <text:list-item>
          <text:p text:style-name="P86">"A percepção do vídeo piorou?" </text:p>
        </text:list-item>
        <text:list-item>
          <text:p text:style-name="P86">"Surgiu um novo grupo de usuários?" </text:p>
        </text:list-item>
        <text:list-item>
          <text:p text:style-name="P87">"Uma polêmica criou um novo comportamento?" </text:p>
        </text:list-item>
      </text:list>
      <text:p text:style-name="P66">O importante é entender que você não está monitorando apenas o drift dos dados (Data Drift), mas também:</text:p>
      <text:list text:style-name="L13">
        <text:list-item>
          <text:p text:style-name="P88"><text:span text:style-name="Strong_20_Emphasis">Audience Drift</text:span> </text:p>
        </text:list-item>
        <text:list-item>
          <text:p text:style-name="P88"><text:span text:style-name="Strong_20_Emphasis">Topic Drift</text:span> </text:p>
        </text:list-item>
        <text:list-item>
          <text:p text:style-name="P88"><text:span text:style-name="Strong_20_Emphasis">Cluster Drift</text:span> </text:p>
        </text:list-item>
        <text:list-item>
          <text:p text:style-name="P89"><text:span text:style-name="Strong_20_Emphasis">Sentiment Drift</text:span> (opcional) </text:p>
        </text:list-item>
      </text:list>
      <text:p text:style-name="P82"/>
      <text:h text:style-name="P69" text:outline-level="1">1. O que é Drift neste contexto?</text:h>
      <text:p text:style-name="P66">Imagine um vídeo sobre Apache Kafka.</text:p>
      <text:h text:style-name="P78" text:outline-level="2">Dia 1</text:h>
      <text:p text:style-name="P66">Comentários:</text:p>
      <text:section text:style-name="Sect1" text:name="code-block-viewer">
        <text:p text:style-name="P90"><text:span text:style-name="Source_20_Text">Muito boa a explicação</text:span></text:p>
        <text:p text:style-name="P91"><text:span text:style-name="Source_20_Text">Kafka ficou fácil de entender</text:span></text:p>
        <text:p text:style-name="P92"><text:soft-page-break/><text:span text:style-name="Source_20_Text">Excelente tutorial</text:span></text:p>
      </text:section>
      <text:p text:style-name="P66">Cluster dominante:</text:p>
      <text:section text:style-name="Sect1" text:name="Seção1">
        <text:p text:style-name="P93"><text:bookmark text:name="code-block-viewer"/><text:span text:style-name="Source_20_Text">Aprendizado Positivo</text:span></text:p>
      </text:section>
      <text:p text:style-name="P82"/>
      <text:h text:style-name="P78" text:outline-level="2">Dia 20</text:h>
      <text:p text:style-name="P66">Comentários:</text:p>
      <text:section text:style-name="Sect1" text:name="Seção2">
        <text:p text:style-name="P90"><text:bookmark text:name="code-block-viewer Copia 1"/><text:span text:style-name="Source_20_Text">A versão mostrada está desatualizada</text:span></text:p>
        <text:p text:style-name="P91"><text:span text:style-name="Source_20_Text">O exemplo não funciona</text:span></text:p>
        <text:p text:style-name="P92"><text:span text:style-name="Source_20_Text">Tem erro no docker compose</text:span></text:p>
      </text:section>
      <text:p text:style-name="P66">Cluster dominante:</text:p>
      <text:section text:style-name="Sect1" text:name="Seção3">
        <text:p text:style-name="P93"><text:bookmark text:name="code-block-viewer Copia 2"/><text:span text:style-name="Source_20_Text">Problemas Técnicos</text:span></text:p>
      </text:section>
      <text:p text:style-name="P66">O vídeo é o mesmo.</text:p>
      <text:p text:style-name="P66">A audiência mudou.</text:p>
      <text:p text:style-name="P66">Isso é um drift.</text:p>
      <text:p text:style-name="P82"/>
      <text:h text:style-name="P69" text:outline-level="1">2. Tipos de Drift que vale monitorar</text:h>
      <text:h text:style-name="P78" text:outline-level="2">A. Volume Drift</text:h>
      <text:p text:style-name="P66">Mudança na quantidade de comentários.</text:p>
      <text:h text:style-name="P79" text:outline-level="3">Exemplo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Dia</text:p>
            </table:table-cell>
            <table:table-cell table:style-name="Tabela1.A1" office:value-type="string">
              <text:p text:style-name="Table_20_Heading">Comentários</text:p>
            </table:table-cell>
          </table:table-row>
        </table:table-header-rows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500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520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530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4.500</text:p>
          </table:table-cell>
        </table:table-row>
      </table:table>
      <text:p text:style-name="P66">O dia 4 indica um evento anormal.</text:p>
      <text:p text:style-name="P82"/>
      <text:h text:style-name="P78" text:outline-level="2">B. Cluster Size Drift</text:h>
      <text:p text:style-name="P66">Mudança na participação dos clusters.</text:p>
      <text:h text:style-name="P79" text:outline-level="3">Dia 1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luster</text:p>
            </table:table-cell>
            <table:table-cell table:style-name="Tabela2.A1" office:value-type="string">
              <text:p text:style-name="Table_20_Heading">%</text:p>
            </table:table-cell>
          </table:table-row>
        </table:table-header-rows>
        <table:table-row>
          <table:table-cell table:style-name="Tabela2.A1" office:value-type="string">
            <text:p text:style-name="Table_20_Contents">Tutorial</text:p>
          </table:table-cell>
          <table:table-cell table:style-name="Tabela2.A1" office:value-type="string">
            <text:p text:style-name="Table_20_Contents">70</text:p>
          </table:table-cell>
        </table:table-row>
        <text:soft-page-break/>
        <table:table-row>
          <table:table-cell table:style-name="Tabela2.A1" office:value-type="string">
            <text:p text:style-name="Table_20_Contents">Dúvidas</text:p>
          </table:table-cell>
          <table:table-cell table:style-name="Tabela2.A1" office:value-type="string">
            <text:p text:style-name="Table_20_Contents">20</text:p>
          </table:table-cell>
        </table:table-row>
        <table:table-row>
          <table:table-cell table:style-name="Tabela2.A1" office:value-type="string">
            <text:p text:style-name="Table_20_Contents">Críticas</text:p>
          </table:table-cell>
          <table:table-cell table:style-name="Tabela2.A1" office:value-type="string">
            <text:p text:style-name="Table_20_Contents">10</text:p>
          </table:table-cell>
        </table:table-row>
      </table:table>
      <text:h text:style-name="P79" text:outline-level="3">Dia 10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luster</text:p>
            </table:table-cell>
            <table:table-cell table:style-name="Tabela3.A1" office:value-type="string">
              <text:p text:style-name="Table_20_Heading">%</text:p>
            </table:table-cell>
          </table:table-row>
        </table:table-header-rows>
        <table:table-row>
          <table:table-cell table:style-name="Tabela3.A1" office:value-type="string">
            <text:p text:style-name="Table_20_Contents">Tutorial</text:p>
          </table:table-cell>
          <table:table-cell table:style-name="Tabela3.A1" office:value-type="string">
            <text:p text:style-name="Table_20_Contents">30</text:p>
          </table:table-cell>
        </table:table-row>
        <table:table-row>
          <table:table-cell table:style-name="Tabela3.A1" office:value-type="string">
            <text:p text:style-name="Table_20_Contents">Dúvidas</text:p>
          </table:table-cell>
          <table:table-cell table:style-name="Tabela3.A1" office:value-type="string">
            <text:p text:style-name="Table_20_Contents">15</text:p>
          </table:table-cell>
        </table:table-row>
        <table:table-row>
          <table:table-cell table:style-name="Tabela3.A1" office:value-type="string">
            <text:p text:style-name="Table_20_Contents">Críticas</text:p>
          </table:table-cell>
          <table:table-cell table:style-name="Tabela3.A1" office:value-type="string">
            <text:p text:style-name="Table_20_Contents">55</text:p>
          </table:table-cell>
        </table:table-row>
      </table:table>
      <text:p text:style-name="P66">Mudança importante da audiência.</text:p>
      <text:p text:style-name="P82"/>
      <text:h text:style-name="P78" text:outline-level="2">C. Semantic Drift</text:h>
      <text:p text:style-name="P66">Mudança no significado dos clusters.</text:p>
      <text:p text:style-name="P66">Mesmo cluster.</text:p>
      <text:p text:style-name="P66">Mesmo tema.</text:p>
      <text:p text:style-name="P66">Mas discurso diferente.</text:p>
      <text:p text:style-name="P82"/>
      <text:h text:style-name="P79" text:outline-level="3">Dia 1</text:h>
      <text:section text:style-name="Sect1" text:name="Seção4">
        <text:p text:style-name="P90"><text:bookmark text:name="code-block-viewer Copia 3"/><text:span text:style-name="Source_20_Text">Gostei do tutorial</text:span></text:p>
        <text:p text:style-name="P92"><text:span text:style-name="Source_20_Text">Muito didático</text:span></text:p>
      </text:section>
      <text:p text:style-name="P82"/>
      <text:h text:style-name="P79" text:outline-level="3">Dia 15</text:h>
      <text:section text:style-name="Sect1" text:name="Seção5">
        <text:p text:style-name="P90"><text:bookmark text:name="code-block-viewer Copia 4"/><text:span text:style-name="Source_20_Text">Explicação razoável</text:span></text:p>
        <text:p text:style-name="P92"><text:span text:style-name="Source_20_Text">Faltaram exemplos</text:span></text:p>
      </text:section>
      <text:p text:style-name="P66">O cluster ainda é "Avaliação do Conteúdo".</text:p>
      <text:p text:style-name="P66">Mas a semântica mudou.</text:p>
      <text:p text:style-name="P82"/>
      <text:h text:style-name="P69" text:outline-level="1">3. Como medir Semantic Drift</text:h>
      <text:p text:style-name="P66">Você já possui embeddings.</text:p>
      <text:p text:style-name="P66">Cada cluster possui um centróide.</text:p>
      <text:p text:style-name="P82"/>
      <text:h text:style-name="P78" text:outline-level="2">Dia 1</text:h>
      <text:section text:style-name="Sect1" text:name="Seção6">
        <text:p text:style-name="P93"><text:bookmark text:name="code-block-viewer Copia 5"/><text:span text:style-name="Source_20_Text">centroid_day1</text:span></text:p>
      </text:section>
      <text:section text:style-name="Sect1" text:name="Seção7">
        <text:p text:style-name="P93"><text:bookmark text:name="code-block-viewer Copia 6"/><text:soft-page-break/><text:span text:style-name="Source_20_Text">[0.21, 0.18, -0.44 ...]</text:span></text:p>
      </text:section>
      <text:p text:style-name="P82"/>
      <text:h text:style-name="P78" text:outline-level="2">Dia 2</text:h>
      <text:section text:style-name="Sect1" text:name="Seção8">
        <text:p text:style-name="P93"><text:bookmark text:name="code-block-viewer Copia 7"/><text:span text:style-name="Source_20_Text">centroid_day2</text:span></text:p>
      </text:section>
      <text:section text:style-name="Sect1" text:name="Seção9">
        <text:p text:style-name="P93"><text:bookmark text:name="code-block-viewer Copia 8"/><text:span text:style-name="Source_20_Text">[0.19, 0.15, -0.42 ...]</text:span></text:p>
      </text:section>
      <text:p text:style-name="P82"/>
      <text:p text:style-name="P66">Calculamos:</text:p>
      <text:section text:style-name="Sect1" text:name="Seção10">
        <text:p text:style-name="P90"><text:bookmark text:name="code-block-viewer Copia 9"/><text:span text:style-name="Source_20_Text">from sklearn.metrics.pairwise import cosine_similarity</text:span></text:p>
        <text:p text:style-name="P91"><text:span text:style-name="Source_20_Text">sim = cosine_similarity(</text:span></text:p>
        <text:p text:style-name="P91"><text:span text:style-name="Source_20_Text"><text:s text:c="4"/>centroid_day1.reshape(1,-1),</text:span></text:p>
        <text:p text:style-name="P91"><text:span text:style-name="Source_20_Text"><text:s text:c="4"/>centroid_day2.reshape(1,-1)</text:span></text:p>
        <text:p text:style-name="P92"><text:span text:style-name="Source_20_Text">)[0][0]</text:span></text:p>
      </text:section>
      <text:p text:style-name="P66">Resultado:</text:p>
      <text:section text:style-name="Sect1" text:name="Seção11">
        <text:p text:style-name="P93"><text:bookmark text:name="code-block-viewer Copia 10"/><text:span text:style-name="Source_20_Text">0.95</text:span></text:p>
      </text:section>
      <text:p text:style-name="P66">Cluster estável.</text:p>
      <text:p text:style-name="P82"/>
      <text:p text:style-name="P66">Outro caso:</text:p>
      <text:section text:style-name="Sect1" text:name="Seção12">
        <text:p text:style-name="P93"><text:bookmark text:name="code-block-viewer Copia 11"/><text:span text:style-name="Source_20_Text">0.52</text:span></text:p>
      </text:section>
      <text:p text:style-name="P66">Grande mudança.</text:p>
      <text:p text:style-name="P82"/>
      <text:h text:style-name="P69" text:outline-level="1">4. Drift Score</text:h>
      <text:p text:style-name="P66">Uma métrica simples:</text:p>
      <text:section text:style-name="Sect1" text:name="Seção13">
        <text:p text:style-name="P93"><text:bookmark text:name="code-block-viewer Copia 12"/><text:span text:style-name="Source_20_Text">drift = 1 - similarity</text:span></text:p>
      </text:section>
      <text:p text:style-name="P82"/>
      <text:h text:style-name="P79" text:outline-level="3">Exempl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Similaridade</text:p>
            </table:table-cell>
            <table:table-cell table:style-name="Tabela4.A1" office:value-type="string">
              <text:p text:style-name="Table_20_Heading">Drift</text:p>
            </table:table-cell>
          </table:table-row>
        </table:table-header-rows>
        <table:table-row>
          <table:table-cell table:style-name="Tabela4.A1" office:value-type="string">
            <text:p text:style-name="Table_20_Contents">0.98</text:p>
          </table:table-cell>
          <table:table-cell table:style-name="Tabela4.A1" office:value-type="string">
            <text:p text:style-name="Table_20_Contents">0.02</text:p>
          </table:table-cell>
        </table:table-row>
        <table:table-row>
          <table:table-cell table:style-name="Tabela4.A1" office:value-type="string">
            <text:p text:style-name="Table_20_Contents">0.90</text:p>
          </table:table-cell>
          <table:table-cell table:style-name="Tabela4.A1" office:value-type="string">
            <text:p text:style-name="Table_20_Contents">0.10</text:p>
          </table:table-cell>
        </table:table-row>
        <table:table-row>
          <table:table-cell table:style-name="Tabela4.A1" office:value-type="string">
            <text:p text:style-name="Table_20_Contents">0.70</text:p>
          </table:table-cell>
          <table:table-cell table:style-name="Tabela4.A1" office:value-type="string">
            <text:p text:style-name="Table_20_Contents">0.30</text:p>
          </table:table-cell>
        </table:table-row>
        <table:table-row>
          <table:table-cell table:style-name="Tabela4.A1" office:value-type="string">
            <text:p text:style-name="Table_20_Contents">0.50</text:p>
          </table:table-cell>
          <table:table-cell table:style-name="Tabela4.A1" office:value-type="string">
            <text:p text:style-name="Table_20_Contents">0.50</text:p>
          </table:table-cell>
        </table:table-row>
      </table:table>
      <text:p text:style-name="P82"/>
      <text:p text:style-name="P66">Interpretação:</text:p>
      <text:section text:style-name="Sect1" text:name="Seção14">
        <text:p text:style-name="P90"><text:bookmark text:name="code-block-viewer Copia 13"/><text:span text:style-name="Source_20_Text">0.00 - 0.10 → estável</text:span></text:p>
        <text:p text:style-name="P91"><text:span text:style-name="Source_20_Text">0.10 - 0.25 → atenção</text:span></text:p>
        <text:p text:style-name="P91"><text:soft-page-break/><text:span text:style-name="Source_20_Text">0.25 - 0.40 → mudança relevante</text:span></text:p>
        <text:p text:style-name="P92"><text:span text:style-name="Source_20_Text">&gt;0.40 → ruptura</text:span></text:p>
      </text:section>
      <text:p text:style-name="P82"/>
      <text:h text:style-name="P69" text:outline-level="1">5. Drift Global da Audiência</text:h>
      <text:p text:style-name="P66">Você terá vários clusters.</text:p>
      <text:p text:style-name="P66">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luster</text:p>
            </table:table-cell>
            <table:table-cell table:style-name="Tabela5.A1" office:value-type="string">
              <text:p text:style-name="Table_20_Heading">Similaridade</text:p>
            </table:table-cell>
          </table:table-row>
        </table:table-header-rows>
        <table:table-row>
          <table:table-cell table:style-name="Tabela5.A1" office:value-type="string">
            <text:p text:style-name="Table_20_Contents">0</text:p>
          </table:table-cell>
          <table:table-cell table:style-name="Tabela5.A1" office:value-type="string">
            <text:p text:style-name="Table_20_Contents">0.95</text:p>
          </table:table-cell>
        </table:table-row>
        <table:table-row>
          <table:table-cell table:style-name="Tabela5.A1" office:value-type="string">
            <text:p text:style-name="Table_20_Contents">1</text:p>
          </table:table-cell>
          <table:table-cell table:style-name="Tabela5.A1" office:value-type="string">
            <text:p text:style-name="Table_20_Contents">0.88</text:p>
          </table:table-cell>
        </table:table-row>
        <table:table-row>
          <table:table-cell table:style-name="Tabela5.A1" office:value-type="string">
            <text:p text:style-name="Table_20_Contents">2</text:p>
          </table:table-cell>
          <table:table-cell table:style-name="Tabela5.A1" office:value-type="string">
            <text:p text:style-name="Table_20_Contents">0.91</text:p>
          </table:table-cell>
        </table:table-row>
        <table:table-row>
          <table:table-cell table:style-name="Tabela5.A1" office:value-type="string">
            <text:p text:style-name="Table_20_Contents">3</text:p>
          </table:table-cell>
          <table:table-cell table:style-name="Tabela5.A1" office:value-type="string">
            <text:p text:style-name="Table_20_Contents">0.52</text:p>
          </table:table-cell>
        </table:table-row>
      </table:table>
      <text:p text:style-name="P82"/>
      <text:p text:style-name="P66">Média:</text:p>
      <text:section text:style-name="Sect1" text:name="Seção15">
        <text:p text:style-name="P90"><text:bookmark text:name="code-block-viewer Copia 14"/><text:span text:style-name="Source_20_Text">avg_similarity = df["similarity"].mean()</text:span></text:p>
        <text:p text:style-name="P92"><text:span text:style-name="Source_20_Text">global_drift = 1 - avg_similarity</text:span></text:p>
      </text:section>
      <text:p text:style-name="P66">Resultado:</text:p>
      <text:section text:style-name="Sect1" text:name="Seção16">
        <text:p text:style-name="P93"><text:bookmark text:name="code-block-viewer Copia 15"/><text:span text:style-name="Source_20_Text">0.18</text:span></text:p>
      </text:section>
      <text:p text:style-name="P66">Significa:</text:p>
      <text:p text:style-name="P94">18% de mudança semântica global da audiência.</text:p>
      <text:p text:style-name="P82"/>
      <text:h text:style-name="P69" text:outline-level="1">6. Emergência de Novos Clusters</text:h>
      <text:p text:style-name="P66">Uma das métricas mais importantes.</text:p>
      <text:p text:style-name="P82"/>
      <text:h text:style-name="P78" text:outline-level="2">Dia 1</text:h>
      <text:p text:style-name="P66">Clusters:</text:p>
      <text:section text:style-name="Sect1" text:name="Seção17">
        <text:p text:style-name="P90"><text:bookmark text:name="code-block-viewer Copia 16"/><text:span text:style-name="Source_20_Text">A</text:span></text:p>
        <text:p text:style-name="P91"><text:span text:style-name="Source_20_Text">B</text:span></text:p>
        <text:p text:style-name="P92"><text:span text:style-name="Source_20_Text">C</text:span></text:p>
      </text:section>
      <text:p text:style-name="P82"/>
      <text:h text:style-name="P78" text:outline-level="2">Dia 2</text:h>
      <text:p text:style-name="P66">Clusters:</text:p>
      <text:section text:style-name="Sect1" text:name="Seção18">
        <text:p text:style-name="P90"><text:bookmark text:name="code-block-viewer Copia 17"/><text:span text:style-name="Source_20_Text">A</text:span></text:p>
        <text:p text:style-name="P91"><text:soft-page-break/><text:span text:style-name="Source_20_Text">B</text:span></text:p>
        <text:p text:style-name="P91"><text:span text:style-name="Source_20_Text">C</text:span></text:p>
        <text:p text:style-name="P92"><text:span text:style-name="Source_20_Text">D</text:span></text:p>
      </text:section>
      <text:p text:style-name="P82"/>
      <text:p text:style-name="P66">Cluster D não encontra correspondência.</text:p>
      <text:p text:style-name="P66">Logo:</text:p>
      <text:section text:style-name="Sect1" text:name="Seção19">
        <text:p text:style-name="P93"><text:bookmark text:name="code-block-viewer Copia 18"/><text:span text:style-name="Source_20_Text">Novo tema emergente</text:span></text:p>
      </text:section>
      <text:p text:style-name="P82"/>
      <text:p text:style-name="P66">Código:</text:p>
      <text:section text:style-name="Sect1" text:name="Seção20">
        <text:p text:style-name="P90"><text:bookmark text:name="code-block-viewer Copia 19"/><text:span text:style-name="Source_20_Text">new_clusters = []</text:span></text:p>
        <text:p text:style-name="P91"><text:span text:style-name="Source_20_Text">for cluster in today_clusters:</text:span></text:p>
        <text:p text:style-name="P91"><text:span text:style-name="Source_20_Text"><text:s text:c="4"/>if best_similarity &lt; 0.75:</text:span></text:p>
        <text:p text:style-name="P92"><text:span text:style-name="Source_20_Text"><text:s text:c="8"/>new_clusters.append(cluster)</text:span></text:p>
      </text:section>
      <text:p text:style-name="P82"/>
      <text:p text:style-name="P66">Métrica:</text:p>
      <text:section text:style-name="Sect1" text:name="Seção21">
        <text:p text:style-name="P90"><text:bookmark text:name="code-block-viewer Copia 20"/><text:span text:style-name="Source_20_Text">new_cluster_ratio =</text:span></text:p>
        <text:p text:style-name="P92"><text:span text:style-name="Source_20_Text">len(new_clusters) / total_clusters</text:span></text:p>
      </text:section>
      <text:p text:style-name="P82"/>
      <text:h text:style-name="P69" text:outline-level="1">7. Cluster Death</text:h>
      <text:p text:style-name="P66">Também existe o fenômeno contrário.</text:p>
      <text:p text:style-name="P82"/>
      <text:p text:style-name="P66">Dia 1</text:p>
      <text:section text:style-name="Sect1" text:name="Seção22">
        <text:p text:style-name="P90"><text:bookmark text:name="code-block-viewer Copia 21"/><text:span text:style-name="Source_20_Text">A</text:span></text:p>
        <text:p text:style-name="P91"><text:span text:style-name="Source_20_Text">B</text:span></text:p>
        <text:p text:style-name="P91"><text:span text:style-name="Source_20_Text">C</text:span></text:p>
        <text:p text:style-name="P92"><text:span text:style-name="Source_20_Text">D</text:span></text:p>
      </text:section>
      <text:p text:style-name="P82"/>
      <text:p text:style-name="P66">Dia 2</text:p>
      <text:section text:style-name="Sect1" text:name="Seção23">
        <text:p text:style-name="P90"><text:bookmark text:name="code-block-viewer Copia 22"/><text:span text:style-name="Source_20_Text">A</text:span></text:p>
        <text:p text:style-name="P91"><text:span text:style-name="Source_20_Text">B</text:span></text:p>
        <text:p text:style-name="P92"><text:span text:style-name="Source_20_Text">C</text:span></text:p>
      </text:section>
      <text:p text:style-name="P82"/>
      <text:p text:style-name="P66">Cluster D desapareceu.</text:p>
      <text:p text:style-name="P66">Pode indicar:</text:p>
      <text:list text:style-name="L14">
        <text:list-item>
          <text:p text:style-name="P95">assunto perdeu relevância </text:p>
        </text:list-item>
        <text:list-item>
          <text:p text:style-name="P95">problema resolvido </text:p>
        </text:list-item>
        <text:list-item>
          <text:p text:style-name="P96">hype terminou </text:p>
        </text:list-item>
      </text:list>
      <text:p text:style-name="P82"><text:soft-page-break/></text:p>
      <text:h text:style-name="P69" text:outline-level="1">8. Cluster Split</text:h>
      <text:p text:style-name="P66">Muito comum em comentários.</text:p>
      <text:p text:style-name="P82"/>
      <text:p text:style-name="P66">Dia 1</text:p>
      <text:section text:style-name="Sect1" text:name="Seção24">
        <text:p text:style-name="P93"><text:bookmark text:name="code-block-viewer Copia 23"/><text:span text:style-name="Source_20_Text">Cluster A</text:span></text:p>
      </text:section>
      <text:p text:style-name="P66">Tema:</text:p>
      <text:section text:style-name="Sect1" text:name="Seção25">
        <text:p text:style-name="P93"><text:bookmark text:name="code-block-viewer Copia 24"/><text:span text:style-name="Source_20_Text">Kafka</text:span></text:p>
      </text:section>
      <text:p text:style-name="P82"/>
      <text:p text:style-name="P66">Dia 10</text:p>
      <text:p text:style-name="P66">A audiência cresce.</text:p>
      <text:p text:style-name="P66">Cluster A divide-se em:</text:p>
      <text:section text:style-name="Sect1" text:name="Seção26">
        <text:p text:style-name="P90"><text:bookmark text:name="code-block-viewer Copia 25"/><text:span text:style-name="Source_20_Text">Kafka Connect</text:span></text:p>
        <text:p text:style-name="P92"><text:span text:style-name="Source_20_Text">Kafka Streams</text:span></text:p>
      </text:section>
      <text:p text:style-name="P82"/>
      <text:p text:style-name="P66">Visualmente:</text:p>
      <text:section text:style-name="Sect1" text:name="Seção27">
        <text:p text:style-name="P90"><text:bookmark text:name="code-block-viewer Copia 26"/><text:span text:style-name="Source_20_Text">A</text:span></text:p>
        <text:p text:style-name="P91"><text:span text:style-name="Source_20_Text">│</text:span></text:p>
        <text:p text:style-name="P91"><text:span text:style-name="Source_20_Text">├── A1</text:span></text:p>
        <text:p text:style-name="P92"><text:span text:style-name="Source_20_Text">└── A2</text:span></text:p>
      </text:section>
      <text:p text:style-name="P82"/>
      <text:p text:style-name="P66">Isso é um indicador de maturidade da comunidade.</text:p>
      <text:p text:style-name="P82"/>
      <text:h text:style-name="P69" text:outline-level="1">9. Cluster Merge</text:h>
      <text:p text:style-name="P66">O inverso.</text:p>
      <text:p text:style-name="P82"/>
      <text:p text:style-name="P66">Dia 1</text:p>
      <text:section text:style-name="Sect1" text:name="Seção28">
        <text:p text:style-name="P90"><text:bookmark text:name="code-block-viewer Copia 27"/><text:span text:style-name="Source_20_Text">Cluster Docker</text:span></text:p>
        <text:p text:style-name="P92"><text:span text:style-name="Source_20_Text">Cluster Kubernetes</text:span></text:p>
      </text:section>
      <text:p text:style-name="P82"/>
      <text:p text:style-name="P66">Dia 20</text:p>
      <text:section text:style-name="Sect1" text:name="Seção29">
        <text:p text:style-name="P93"><text:bookmark text:name="code-block-viewer Copia 28"/><text:span text:style-name="Source_20_Text">Cluster DevOps</text:span></text:p>
      </text:section>
      <text:p text:style-name="P82"><text:soft-page-break/></text:p>
      <text:p text:style-name="P66">O sistema detecta:</text:p>
      <text:section text:style-name="Sect1" text:name="Seção30">
        <text:p text:style-name="P93"><text:bookmark text:name="code-block-viewer Copia 29"/><text:span text:style-name="Source_20_Text">Docker + Kubernetes → DevOps</text:span></text:p>
      </text:section>
      <text:p text:style-name="P82"/>
      <text:h text:style-name="P69" text:outline-level="1">10. Métricas para armazenar na camada ml/drift_metrics</text:h>
      <text:p text:style-name="P66">Uma tabela diária poderia ser: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Data</text:p>
            </table:table-cell>
            <table:table-cell table:style-name="Tabela6.A1" office:value-type="string">
              <text:p text:style-name="Table_20_Heading">Métrica</text:p>
            </table:table-cell>
            <table:table-cell table:style-name="Tabela6.A1" office:value-type="string">
              <text:p text:style-name="Table_20_Heading">Valor</text:p>
            </table:table-cell>
          </table:table-row>
        </table:table-header-rows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total_comments</text:p>
          </table:table-cell>
          <table:table-cell table:style-name="Tabela6.A1" office:value-type="string">
            <text:p text:style-name="Table_20_Contents">4200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num_clusters</text:p>
          </table:table-cell>
          <table:table-cell table:style-name="Tabela6.A1" office:value-type="string">
            <text:p text:style-name="Table_20_Contents">8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noise_ratio</text:p>
          </table:table-cell>
          <table:table-cell table:style-name="Tabela6.A1" office:value-type="string">
            <text:p text:style-name="Table_20_Contents">0.12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global_drift</text:p>
          </table:table-cell>
          <table:table-cell table:style-name="Tabela6.A1" office:value-type="string">
            <text:p text:style-name="Table_20_Contents">0.18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new_cluster_ratio</text:p>
          </table:table-cell>
          <table:table-cell table:style-name="Tabela6.A1" office:value-type="string">
            <text:p text:style-name="Table_20_Contents">0.25</text:p>
          </table:table-cell>
        </table:table-row>
        <table:table-row>
          <table:table-cell table:style-name="Tabela6.A1" office:value-type="string">
            <text:p text:style-name="Table_20_Contents">2026-05-01</text:p>
          </table:table-cell>
          <table:table-cell table:style-name="Tabela6.A1" office:value-type="string">
            <text:p text:style-name="Table_20_Contents">dead_cluster_ratio</text:p>
          </table:table-cell>
          <table:table-cell table:style-name="Tabela6.A1" office:value-type="string">
            <text:p text:style-name="Table_20_Contents">0.10</text:p>
          </table:table-cell>
        </table:table-row>
      </table:table>
      <text:p text:style-name="P82"/>
      <text:h text:style-name="P69" text:outline-level="1">11. Registrando no MLflow</text:h>
      <text:p text:style-name="P66">MLflow</text:p>
      <text:section text:style-name="Sect1" text:name="Seção31">
        <text:p text:style-name="P90"><text:bookmark text:name="code-block-viewer Copia 30"/><text:span text:style-name="Source_20_Text">import mlflow</text:span></text:p>
        <text:p text:style-name="P91"><text:span text:style-name="Source_20_Text">mlflow.log_metric(</text:span></text:p>
        <text:p text:style-name="P91"><text:span text:style-name="Source_20_Text"><text:s text:c="4"/>"global_drift",</text:span></text:p>
        <text:p text:style-name="P91"><text:span text:style-name="Source_20_Text"><text:s text:c="4"/>global_drift</text:span></text:p>
        <text:p text:style-name="P91"><text:span text:style-name="Source_20_Text">)</text:span></text:p>
        <text:p text:style-name="P91"><text:span text:style-name="Source_20_Text">mlflow.log_metric(</text:span></text:p>
        <text:p text:style-name="P91"><text:span text:style-name="Source_20_Text"><text:s text:c="4"/>"new_cluster_ratio",</text:span></text:p>
        <text:p text:style-name="P91"><text:span text:style-name="Source_20_Text"><text:s text:c="4"/>new_cluster_ratio</text:span></text:p>
        <text:p text:style-name="P91"><text:span text:style-name="Source_20_Text">)</text:span></text:p>
        <text:p text:style-name="P91"><text:span text:style-name="Source_20_Text">mlflow.log_metric(</text:span></text:p>
        <text:p text:style-name="P91"><text:span text:style-name="Source_20_Text"><text:s text:c="4"/>"dead_cluster_ratio",</text:span></text:p>
        <text:p text:style-name="P91"><text:span text:style-name="Source_20_Text"><text:s text:c="4"/>dead_cluster_ratio</text:span></text:p>
        <text:p text:style-name="P91"><text:span text:style-name="Source_20_Text">)</text:span></text:p>
        <text:p text:style-name="P91"><text:span text:style-name="Source_20_Text">mlflow.log_metric(</text:span></text:p>
        <text:p text:style-name="P91"><text:span text:style-name="Source_20_Text"><text:s text:c="4"/>"avg_similarity",</text:span></text:p>
        <text:p text:style-name="P91"><text:span text:style-name="Source_20_Text"><text:s text:c="4"/>avg_similarity</text:span></text:p>
        <text:p text:style-name="P92"><text:span text:style-name="Source_20_Text">)</text:span></text:p>
      </text:section>
      <text:p text:style-name="P82"/>
      <text:h text:style-name="P69" text:outline-level="1">12. Métrica mais poderosa para o dashboard</text:h>
      <text:p text:style-name="P66">No dashboard do Apache Superset, eu destacaria:</text:p>
      <text:section text:style-name="Sect1" text:name="Seção32">
        <text:p text:style-name="P90"><text:bookmark text:name="code-block-viewer Copia 31"/><text:span text:style-name="Source_20_Text">Audience Stability Index (ASI)</text:span></text:p>
        <text:p text:style-name="P92"><text:span text:style-name="Source_20_Text">ASI = média das similaridades dos clusters</text:span></text:p>
      </text:section>
      <text:p text:style-name="P66"><text:soft-page-break/>Exemplo: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Dia</text:p>
            </table:table-cell>
            <table:table-cell table:style-name="Tabela7.A1" office:value-type="string">
              <text:p text:style-name="Table_20_Heading">ASI</text:p>
            </table:table-cell>
          </table:table-row>
        </table:table-header-rows>
        <table:table-row>
          <table:table-cell table:style-name="Tabela7.A1" office:value-type="string">
            <text:p text:style-name="Table_20_Contents">01</text:p>
          </table:table-cell>
          <table:table-cell table:style-name="Tabela7.A1" office:value-type="string">
            <text:p text:style-name="Table_20_Contents">0.94</text:p>
          </table:table-cell>
        </table:table-row>
        <table:table-row>
          <table:table-cell table:style-name="Tabela7.A1" office:value-type="string">
            <text:p text:style-name="Table_20_Contents">02</text:p>
          </table:table-cell>
          <table:table-cell table:style-name="Tabela7.A1" office:value-type="string">
            <text:p text:style-name="Table_20_Contents">0.93</text:p>
          </table:table-cell>
        </table:table-row>
        <table:table-row>
          <table:table-cell table:style-name="Tabela7.A1" office:value-type="string">
            <text:p text:style-name="Table_20_Contents">03</text:p>
          </table:table-cell>
          <table:table-cell table:style-name="Tabela7.A1" office:value-type="string">
            <text:p text:style-name="Table_20_Contents">0.92</text:p>
          </table:table-cell>
        </table:table-row>
        <table:table-row>
          <table:table-cell table:style-name="Tabela7.A1" office:value-type="string">
            <text:p text:style-name="Table_20_Contents">04</text:p>
          </table:table-cell>
          <table:table-cell table:style-name="Tabela7.A1" office:value-type="string">
            <text:p text:style-name="Table_20_Contents">0.65</text:p>
          </table:table-cell>
        </table:table-row>
      </table:table>
      <text:p text:style-name="P66">O dia 04 sinaliza uma mudança relevante na audiência.</text:p>
      <text:p text:style-name="P66">Essa métrica é simples de explicar para áreas de negócio e resume, em um único número, o quanto a audiência permaneceu semelhante ao comportamento observado anteriorment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6.2.2.2$Linux_X86_64 LibreOffice_project/620$Build-2</meta:generator>
    <dc:date>2026-05-31T14:02:45.457673788</dc:date>
    <meta:editing-duration>PT41M26S</meta:editing-duration>
    <meta:editing-cycles>5</meta:editing-cycles>
    <meta:document-statistic meta:table-count="9" meta:image-count="0" meta:object-count="0" meta:page-count="23" meta:paragraph-count="700" meta:word-count="2221" meta:character-count="16271" meta:non-whitespace-character-count="14410"/>
  </office:meta>
</office:document-meta>
</file>